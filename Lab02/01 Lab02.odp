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3000002D092D4F91A.png" manifest:media-type="image/png"/>
  <manifest:file-entry manifest:full-path="Pictures/100000010000005000000050C3391230.png" manifest:media-type="image/png"/>
  <manifest:file-entry manifest:full-path="Pictures/10000001000003D500000215ADE478E5.png" manifest:media-type="image/png"/>
  <manifest:file-entry manifest:full-path="Pictures/10000001000003E8000001BA4071115B.png" manifest:media-type="image/png"/>
  <manifest:file-entry manifest:full-path="Pictures/10000001000004EE0000031E74070BD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0D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 smil:type="zo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2.53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iapositiva_20_de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254cm" fo:padding-bottom="0.254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iapositiva_20_de_20_título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iapositiva_20_de_20_título-notes" style:list-style-name="L4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ítulo_20_y_20_objetos_5f__5f__5f__5f_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ítulo_20_y_20_objetos_5f__5f__5f__5f__5f__5f__5f__5f__5f__5f__5f__5f__5f__5f__5f__5f__5f__5f_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ítulo_20_y_20_objetos_5f__5f__5f__5f__5f__5f__5f__5f__5f__5f__5f__5f__5f__5f__5f__5f__5f__5f_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Título_20_y_20_objetos_5f__5f__5f__5f__5f_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ítulo_20_y_20_objetos_5f__5f__5f__5f__5f__5f__5f__5f__5f__5f__5f__5f__5f__5f__5f__5f__5f__5f__5f_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ítulo_20_y_20_objetos_5f__5f__5f__5f__5f__5f__5f__5f__5f__5f__5f__5f__5f__5f__5f__5f__5f__5f__5f_-notes">
      <style:graphic-properties draw:fill-color="#ffffff" fo:min-height="12.572cm" loext:decorative="false"/>
      <style:paragraph-properties style:writing-mode="lr-tb"/>
    </style:style>
    <style:style style:name="pr10" style:family="presentation" style:parent-style-name="Título_20_y_20_objetos_5f__5f__5f__5f__5f__5f_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ítulo_20_y_20_objetos_5f__5f__5f__5f__5f__5f__5f__5f__5f__5f__5f__5f__5f__5f__5f__5f__5f__5f__5f__5f_-notes">
      <style:graphic-properties draw:fill-color="#ffffff" fo:min-height="12.572cm" loext:decorative="false"/>
      <style:paragraph-properties style:writing-mode="lr-tb"/>
    </style:style>
    <style:style style:name="pr12" style:family="presentation" style:parent-style-name="Título_20_y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ítulo_20_y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ítulo_20_y_20_objetos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90%" fo:text-align="center" fo:text-indent="0cm" style:punctuation-wrap="simple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fo:text-align="center" loext:tab-stop-distance="0cm" style:font-independent-line-spacing="true">
        <style:tab-stops/>
      </style:paragraph-properties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loext:graphic-properties draw:fill="none"/>
      <style:text-properties fo:font-size="18pt"/>
    </style:style>
    <style:style style:name="P7" style:family="paragraph">
      <style:paragraph-properties fo:margin-left="0cm" fo:margin-right="0cm" fo:margin-top="0.42cm" fo:margin-bottom="0.35cm" fo:line-height="90%" fo:text-align="start" fo:text-indent="0cm" style:punctuation-wrap="simple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1cm" fo:margin-bottom="0cm" fo:line-height="90%" fo:text-align="start" fo:text-indent="0cm" style:punctuation-wrap="simple" style:writing-mode="lr-tb"/>
    </style:style>
    <style:style style:name="P10" style:family="paragraph">
      <loext:graphic-properties draw:fill="none"/>
      <style:paragraph-properties fo:margin-left="0cm" fo:margin-right="0cm" fo:margin-top="0.1cm" fo:margin-bottom="0cm" fo:line-height="90%" fo:text-align="start" fo:text-indent="0cm" style:punctuation-wrap="simple" style:font-independent-line-spacing="true"/>
      <style:text-properties fo:font-size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simple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24pt" fo:letter-spacing="normal" fo:language="es" fo:country="MX" fo:font-style="italic" fo:text-shadow="none" style:text-underline-style="none" fo:font-weight="bold" style:letter-kerning="true" fo:background-color="transparent" style:font-name-asian="Microsoft YaHei" style:font-size-asian="24pt" style:font-style-asian="italic" style:font-weight-asian="bold" style:font-name-complex="Arial2" style:font-size-complex="24pt" style:font-style-complex="italic" style:font-weight-complex="bold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32pt" fo:letter-spacing="normal" fo:language="es" fo:country="MX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4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20pt" fo:letter-spacing="normal" fo:language="es" fo:country="MX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ragon - Gideon " draw:style-name="dp1" draw:master-page-name="Diapositiva_20_de_20_título" presentation:presentation-page-layout-name="AL1T0" xml:id="id1" draw:id="id1">
        <draw:frame draw:name="4 Título" presentation:style-name="pr1" draw:text-style-name="P2" draw:layer="layout" svg:width="22.012cm" svg:height="1.435cm" svg:x="1.746cm" svg:y="8.984cm" presentation:class="title" presentation:user-transformed="true">
          <draw:text-box>
            <text:p text:style-name="P1"><text:span text:style-name="T1">Prototipado usando Unity</text:span></text:p>
          </draw:text-box>
        </draw:frame>
        <anim:par presentation:node-type="timing-root">
          <anim:par smil:begin="id1.begin">
            <anim:transitionFilter smil:dur="0.5s" smil:type="zoom"/>
          </anim:par>
          <anim:seq smil:dur="0s" presentation:node-type="main-sequence"/>
        </anim:par>
        <presentation:notes draw:style-name="dp2">
          <draw:frame draw:name="Rectangle 7" presentation:style-name="pr2" draw:text-style-name="P4" draw:layer="layout" svg:width="3.055cm" svg:height="1.269cm" svg:x="15.99cm" svg:y="24.126cm" presentation:class="page-number" presentation:user-transformed="true">
            <draw:text-box>
              <text:p text:style-name="P3"><text:span text:style-name="T2"><text:page-number>&lt;núme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Marcador de notas 1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ítulo_20_y_20_objetos_5f__5f__5f__5f__5f__5f__5f__5f__5f__5f__5f__5f__5f__5f__5f__5f__5f__5f_" presentation:presentation-page-layout-name="AL2T11" xml:id="id2" draw:id="id2">
        <draw:frame draw:style-name="gr2" draw:text-style-name="P6" draw:layer="layout" svg:width="0.502cm" svg:height="2.784cm" svg:x="-0.444cm" svg:y="-0.334cm">
          <draw:text-box>
            <text:p><text:span text:style-name="T3"><text:line-break/></text:span><text:span text:style-name="T3"/></text:p>
          </draw:text-box>
        </draw:frame>
        <draw:frame draw:name="Título 10" presentation:style-name="pr4" draw:text-style-name="P8" draw:layer="layout" svg:width="25.399cm" svg:height="3cm" svg:x="0.002cm" svg:y="0cm" presentation:class="title" presentation:user-transformed="true">
          <draw:text-box>
            <text:p text:style-name="P7"><text:span text:style-name="T4">Recursos utilizados</text:span><text:span text:style-name="T4"><text:line-break/></text:span><text:span text:style-name="T4"/></text:p>
          </draw:text-box>
        </draw:frame>
        <draw:frame draw:name="Marcador de contenido 11" presentation:style-name="pr5" draw:text-style-name="P10" draw:layer="layout" svg:width="23.388cm" svg:height="6cm" svg:x="1.112cm" svg:y="3cm" presentation:class="outline" presentation:user-transformed="true">
          <draw:text-box>
            <text:list text:style-name="L3">
              <text:list-item>
                <text:p text:style-name="P9"><text:span text:style-name="T5">Los recursos aquí mostrados son utilizados por el instructor únicamente por <text:s/>propósitos académicos y no se persiguen fines de lucro. Los alumnos deberán desarrollar sus propios recursos.</text:span></text:p>
              </text:list-item>
              <text:list-item>
                <text:p text:style-name="P9"><text:span text:style-name="T5">Unity Asset Store</text:span></text:p>
              </text:list-item>
            </text:list>
          </draw:text-box>
        </draw:frame>
        <draw:frame draw:style-name="gr3" draw:text-style-name="P11" draw:layer="layout" svg:width="20.088cm" svg:height="10.913cm" svg:x="2.5cm" svg:y="6.587cm">
          <draw:image xlink:href="Pictures/10000001000003D500000215ADE478E5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ítulo_20_y_20_objetos_5f__5f__5f__5f__5f__5f__5f__5f__5f__5f__5f__5f__5f__5f__5f__5f__5f__5f__5f_" presentation:presentation-page-layout-name="AL2T11" xml:id="id3" draw:id="id3">
        <draw:frame draw:style-name="gr2" draw:text-style-name="P6" draw:layer="layout" svg:width="0.502cm" svg:height="2.784cm" svg:x="-0.444cm" svg:y="-0.334cm">
          <draw:text-box>
            <text:p><text:span text:style-name="T3"><text:line-break/></text:span><text:span text:style-name="T3"/></text:p>
          </draw:text-box>
        </draw:frame>
        <draw:frame draw:name="Título 3" presentation:style-name="pr7" draw:text-style-name="P8" draw:layer="layout" svg:width="25.399cm" svg:height="3cm" svg:x="0.002cm" svg:y="0cm" presentation:class="title" presentation:user-transformed="true">
          <draw:text-box>
            <text:p text:style-name="P7"><text:span text:style-name="T4">Recursos utilizados</text:span><text:span text:style-name="T4"><text:line-break/></text:span><text:span text:style-name="T4"/></text:p>
          </draw:text-box>
        </draw:frame>
        <draw:frame draw:name="Marcador de contenido 3" presentation:style-name="pr8" draw:text-style-name="P10" draw:layer="layout" svg:width="23.388cm" svg:height="6cm" svg:x="1.112cm" svg:y="3cm" presentation:class="outline" presentation:user-transformed="true">
          <draw:text-box>
            <text:list text:style-name="L3">
              <text:list-item>
                <text:p text:style-name="P9"><text:span text:style-name="T5">Los recursos aquí mostrados son utilizados por el instructor únicamente por <text:s/>propósitos académicos y no se persiguen fines de lucro. Los alumnos deberán desarrollar sus propios recursos.</text:span></text:p>
              </text:list-item>
              <text:list-item>
                <text:p text:style-name="P9"><text:span text:style-name="T5">Unity Asset Store</text:span></text:p>
              </text:list-item>
            </text:list>
          </draw:text-box>
        </draw:frame>
        <draw:frame draw:style-name="gr3" draw:text-style-name="P11" draw:layer="layout" svg:width="19.789cm" svg:height="8.746cm" svg:x="2.711cm" svg:y="7.254cm">
          <draw:image xlink:href="Pictures/10000001000003E8000001BA4071115B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ítulo_20_y_20_objetos_5f__5f__5f__5f__5f__5f__5f__5f__5f__5f__5f__5f__5f__5f__5f__5f__5f__5f__5f__5f_" presentation:presentation-page-layout-name="AL2T11" xml:id="id4" draw:id="id4">
        <draw:frame draw:style-name="gr2" draw:text-style-name="P6" draw:layer="layout" svg:width="0.502cm" svg:height="2.784cm" svg:x="-0.444cm" svg:y="-0.334cm">
          <draw:text-box>
            <text:p><text:span text:style-name="T3"><text:line-break/></text:span><text:span text:style-name="T3"/></text:p>
          </draw:text-box>
        </draw:frame>
        <draw:frame draw:name="Título 2" presentation:style-name="pr10" draw:text-style-name="P8" draw:layer="layout" svg:width="25.399cm" svg:height="3cm" svg:x="0.002cm" svg:y="0cm" presentation:class="title" presentation:user-transformed="true">
          <draw:text-box>
            <text:p text:style-name="P7"><text:span text:style-name="T4">Unity - Prototipo</text:span><text:span text:style-name="T4"><text:line-break/></text:span><text:span text:style-name="T4"/></text:p>
          </draw:text-box>
        </draw:frame>
        <draw:frame draw:style-name="gr4" draw:text-style-name="P13" draw:layer="layout" svg:width="25.399cm" svg:height="16.059cm" svg:x="0cm" svg:y="1.803cm">
          <draw:image xlink:href="Pictures/10000001000004EE0000031E74070BDA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2.699cm" svg:height="9.524cm" svg:x="3.175cm" svg:y="1.93cm" draw:page-number="4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ias Bibliográficas" draw:style-name="dp3" draw:master-page-name="Título_20_y_20_objetos" presentation:presentation-page-layout-name="AL2T11" xml:id="id5" draw:id="id5">
        <draw:frame draw:name="Título 1" presentation:style-name="pr12" draw:text-style-name="P8" draw:layer="layout" svg:width="25.399cm" svg:height="1.904cm" svg:x="0cm" svg:y="0cm" presentation:class="title" presentation:user-transformed="true">
          <draw:text-box>
            <text:p text:style-name="P14"><text:span text:style-name="T3">Referencias Bibliográficas</text:span></text:p>
          </draw:text-box>
        </draw:frame>
        <draw:frame draw:name="Marcador de contenido 1" presentation:style-name="pr13" draw:text-style-name="P15" draw:layer="layout" svg:width="23.388cm" svg:height="1.512cm" svg:x="1.005cm" svg:y="2.54cm" presentation:class="outline" presentation:placeholder="true" presentation:user-transformed="true">
          <draw:text-box/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5" presentation:class="page"/>
          <draw:frame presentation:style-name="pr1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sFillBitmap_20_1" draw:display-name="msFillBitmap 1" xlink:href="Pictures/10000000000003C3000002D092D4F9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Diapositiva_20_de_20_título-background" style:display-name="Diapositiva de título-background" style:family="presentation">
      <style:graphic-properties draw:stroke="none" draw:fill="solid" draw:fill-color="#15365b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background" style:display-name="Título y texto vertical-background" style:family="presentation">
      <style:graphic-properties draw:stroke="none" draw:fill="solid" draw:fill-color="#15365b"/>
      <style:text-properties style:letter-kerning="true"/>
    </style:style>
    <style:style style:name="Título_20_y_20_texto_20_vertical-backgroundobjects" style:display-name="Título y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exto_20_vertical-notes" style:display-name="Título y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1" style:display-name="Título y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y_20_texto_20_vertical-outline1" style:display-name="Título y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outline2" style:display-name="Título y texto vertical-outline2" style:family="presentation" style:parent-style-name="Título_20_y_20_texto_20_vertical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3" style:display-name="Título y texto vertical-outline3" style:family="presentation" style:parent-style-name="Título_20_y_20_texto_20_vertical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4" style:display-name="Título y texto vertical-outline4" style:family="presentation" style:parent-style-name="Título_20_y_20_texto_20_vertical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5" style:display-name="Título y texto vertical-outline5" style:family="presentation" style:parent-style-name="Título_20_y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6" style:display-name="Título y texto vertical-outline6" style:family="presentation" style:parent-style-name="Título_20_y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7" style:display-name="Título y texto vertical-outline7" style:family="presentation" style:parent-style-name="Título_20_y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8" style:display-name="Título y texto vertical-outline8" style:family="presentation" style:parent-style-name="Título_20_y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9" style:display-name="Título y texto vertical-outline9" style:family="presentation" style:parent-style-name="Título_20_y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y_20_texto_20_vertical-subtitle" style:display-name="Título y texto vertical-subtitle" style:family="presentation">
      <style:graphic-properties draw:stroke="none" draw:fill="none" draw:textarea-vertical-align="middle">
        <text:list-style style:name="Título_20_y_20_texto_20_vertical-subtitle" style:display-name="Título y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title" style:display-name="Título y texto vertical-title" style:family="presentation">
      <style:graphic-properties draw:stroke="none" draw:fill="none" draw:textarea-vertical-align="middle" style:writing-mode="lr-tb">
        <text:list-style style:name="Título_20_y_20_texto_20_vertical-title" style:display-name="Título y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background" style:display-name="Título vertical y texto-background" style:family="presentation">
      <style:graphic-properties draw:stroke="none" draw:fill="solid" draw:fill-color="#15365b"/>
      <style:text-properties style:letter-kerning="true"/>
    </style:style>
    <style:style style:name="Título_20_vertical_20_y_20_texto-backgroundobjects" style:display-name="Título vertical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y_20_texto-notes" style:display-name="Título vertical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1" style:display-name="Título vertical y texto-outline1" style:family="presentation">
      <style:graphic-properties draw:stroke="none" draw:fill="none" draw:auto-grow-height="false" draw:fit-to-size="false" style:shrink-to-fit="true" style:writing-mode="lr-tb">
        <text:list-style style:name="Título_20_vertical_20_y_20_texto-outline1" style:display-name="Título vertical y 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outline2" style:display-name="Título vertical y texto-outline2" style:family="presentation" style:parent-style-name="Título_20_vertical_20_y_20_text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3" style:display-name="Título vertical y texto-outline3" style:family="presentation" style:parent-style-name="Título_20_vertical_20_y_20_text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4" style:display-name="Título vertical y texto-outline4" style:family="presentation" style:parent-style-name="Título_20_vertical_20_y_20_text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5" style:display-name="Título vertical y texto-outline5" style:family="presentation" style:parent-style-name="Título_20_vertical_20_y_20_texto-outline4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6" style:display-name="Título vertical y texto-outline6" style:family="presentation" style:parent-style-name="Título_20_vertical_20_y_20_texto-outline5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7" style:display-name="Título vertical y texto-outline7" style:family="presentation" style:parent-style-name="Título_20_vertical_20_y_20_texto-outline6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8" style:display-name="Título vertical y texto-outline8" style:family="presentation" style:parent-style-name="Título_20_vertical_20_y_20_texto-outline7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9" style:display-name="Título vertical y texto-outline9" style:family="presentation" style:parent-style-name="Título_20_vertical_20_y_20_texto-outline8">
      <style:paragraph-properties fo:margin-top="0.1cm" fo:margin-bottom="0cm"/>
      <style:text-properties fo:font-size="20pt" style:font-size-asian="20pt" style:font-size-complex="20pt"/>
    </style:style>
    <style:style style:name="Título_20_vertical_20_y_20_texto-subtitle" style:display-name="Título vertical y texto-subtitle" style:family="presentation">
      <style:graphic-properties draw:stroke="none" draw:fill="none" draw:textarea-vertical-align="middle">
        <text:list-style style:name="Título_20_vertical_20_y_20_texto-subtitle" style:display-name="Título vertical y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title" style:display-name="Título vertical y texto-title" style:family="presentation">
      <style:graphic-properties draw:stroke="none" draw:fill="none" draw:textarea-vertical-align="middle" style:writing-mode="lr-tb">
        <text:list-style style:name="Título_20_vertical_20_y_20_texto-title" style:display-name="Título vertical y 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c__20_texto_20_y_20_objetos-background" style:display-name="Título, texto y objetos-background" style:family="presentation">
      <style:graphic-properties draw:stroke="none" draw:fill="solid" draw:fill-color="#15365b"/>
      <style:text-properties style:letter-kerning="true"/>
    </style:style>
    <style:style style:name="Título_2c__20_texto_20_y_20_objetos-backgroundobjects" style:display-name="Título, text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c__20_texto_20_y_20_objetos-notes" style:display-name="Título, text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c__20_texto_20_y_20_objetos-outline1" style:display-name="Título, texto y objetos-outline1" style:family="presentation">
      <style:graphic-properties draw:stroke="none" draw:fill="none" draw:auto-grow-height="false" draw:fit-to-size="false" style:shrink-to-fit="true" style:writing-mode="lr-tb">
        <text:list-style style:name="Título_2c__20_texto_20_y_20_objetos-outline1" style:display-name="Título, text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c__20_texto_20_y_20_objetos-outline2" style:display-name="Título, texto y objetos-outline2" style:family="presentation" style:parent-style-name="Título_2c__20_texto_20_y_20_objetos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c__20_texto_20_y_20_objetos-outline3" style:display-name="Título, texto y objetos-outline3" style:family="presentation" style:parent-style-name="Título_2c__20_texto_20_y_20_objetos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c__20_texto_20_y_20_objetos-outline4" style:display-name="Título, texto y objetos-outline4" style:family="presentation" style:parent-style-name="Título_2c__20_texto_20_y_20_objetos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c__20_texto_20_y_20_objetos-outline5" style:display-name="Título, texto y objetos-outline5" style:family="presentation" style:parent-style-name="Título_2c__20_texto_20_y_20_objetos-outline4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6" style:display-name="Título, texto y objetos-outline6" style:family="presentation" style:parent-style-name="Título_2c__20_texto_20_y_20_objetos-outline5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7" style:display-name="Título, texto y objetos-outline7" style:family="presentation" style:parent-style-name="Título_2c__20_texto_20_y_20_objetos-outline6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8" style:display-name="Título, texto y objetos-outline8" style:family="presentation" style:parent-style-name="Título_2c__20_texto_20_y_20_objetos-outline7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9" style:display-name="Título, texto y objetos-outline9" style:family="presentation" style:parent-style-name="Título_2c__20_texto_20_y_20_objetos-outline8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subtitle" style:display-name="Título, texto y objetos-subtitle" style:family="presentation">
      <style:graphic-properties draw:stroke="none" draw:fill="none" draw:textarea-vertical-align="middle">
        <text:list-style style:name="Título_2c__20_texto_20_y_20_objetos-subtitle" style:display-name="Título, text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c__20_texto_20_y_20_objetos-title" style:display-name="Título, texto y objetos-title" style:family="presentation">
      <style:graphic-properties draw:stroke="none" draw:fill="none" draw:textarea-vertical-align="middle" style:writing-mode="lr-tb">
        <text:list-style style:name="Título_2c__20_texto_20_y_20_objetos-title" style:display-name="Título, text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abla-background" style:display-name="Título y tabla-background" style:family="presentation">
      <style:graphic-properties draw:stroke="none" draw:fill="solid" draw:fill-color="#15365b"/>
      <style:text-properties style:letter-kerning="true"/>
    </style:style>
    <style:style style:name="Título_20_y_20_tabla-backgroundobjects" style:display-name="Título y tab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abla-notes" style:display-name="Título y tab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abla-outline1" style:display-name="Título y tabla-outline1" style:family="presentation">
      <style:graphic-properties draw:stroke="none" draw:fill="none" draw:auto-grow-height="false" draw:fit-to-size="false" style:shrink-to-fit="true" style:writing-mode="lr-tb">
        <text:list-style style:name="Título_20_y_20_tabla-outline1" style:display-name="Título y tabl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abla-outline2" style:display-name="Título y tabla-outline2" style:family="presentation" style:parent-style-name="Título_20_y_20_tabla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tabla-outline3" style:display-name="Título y tabla-outline3" style:family="presentation" style:parent-style-name="Título_20_y_20_tabla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abla-outline4" style:display-name="Título y tabla-outline4" style:family="presentation" style:parent-style-name="Título_20_y_20_tabla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abla-outline5" style:display-name="Título y tabla-outline5" style:family="presentation" style:parent-style-name="Título_20_y_20_tabla-outline4">
      <style:paragraph-properties fo:margin-top="0.1cm" fo:margin-bottom="0cm"/>
      <style:text-properties fo:font-size="20pt" style:font-size-asian="20pt" style:font-size-complex="20pt"/>
    </style:style>
    <style:style style:name="Título_20_y_20_tabla-outline6" style:display-name="Título y tabla-outline6" style:family="presentation" style:parent-style-name="Título_20_y_20_tabla-outline5">
      <style:paragraph-properties fo:margin-top="0.1cm" fo:margin-bottom="0cm"/>
      <style:text-properties fo:font-size="20pt" style:font-size-asian="20pt" style:font-size-complex="20pt"/>
    </style:style>
    <style:style style:name="Título_20_y_20_tabla-outline7" style:display-name="Título y tabla-outline7" style:family="presentation" style:parent-style-name="Título_20_y_20_tabla-outline6">
      <style:paragraph-properties fo:margin-top="0.1cm" fo:margin-bottom="0cm"/>
      <style:text-properties fo:font-size="20pt" style:font-size-asian="20pt" style:font-size-complex="20pt"/>
    </style:style>
    <style:style style:name="Título_20_y_20_tabla-outline8" style:display-name="Título y tabla-outline8" style:family="presentation" style:parent-style-name="Título_20_y_20_tabla-outline7">
      <style:paragraph-properties fo:margin-top="0.1cm" fo:margin-bottom="0cm"/>
      <style:text-properties fo:font-size="20pt" style:font-size-asian="20pt" style:font-size-complex="20pt"/>
    </style:style>
    <style:style style:name="Título_20_y_20_tabla-outline9" style:display-name="Título y tabla-outline9" style:family="presentation" style:parent-style-name="Título_20_y_20_tabla-outline8">
      <style:paragraph-properties fo:margin-top="0.1cm" fo:margin-bottom="0cm"/>
      <style:text-properties fo:font-size="20pt" style:font-size-asian="20pt" style:font-size-complex="20pt"/>
    </style:style>
    <style:style style:name="Título_20_y_20_tabla-subtitle" style:display-name="Título y tabla-subtitle" style:family="presentation">
      <style:graphic-properties draw:stroke="none" draw:fill="none" draw:textarea-vertical-align="middle">
        <text:list-style style:name="Título_20_y_20_tabla-subtitle" style:display-name="Título y tabl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abla-title" style:display-name="Título y tabla-title" style:family="presentation">
      <style:graphic-properties draw:stroke="none" draw:fill="none" draw:textarea-vertical-align="middle" style:writing-mode="lr-tb">
        <text:list-style style:name="Título_20_y_20_tabla-title" style:display-name="Título y tabl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background" style:display-name="Título y objetos-background" style:family="presentation">
      <style:graphic-properties draw:stroke="none" draw:fill="solid" draw:fill-color="#15365b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background" style:display-name="Encabezado de sección-background" style:family="presentation">
      <style:graphic-properties draw:stroke="none" draw:fill="solid" draw:fill-color="#15365b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false" style:shrink-to-fit="true" style:writing-mode="lr-tb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outline2" style:display-name="Encabezado de sección-outline2" style:family="presentation" style:parent-style-name="Encabezado_20_de_20_sección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Encabezado_20_de_20_sección-outline3" style:display-name="Encabezado de sección-outline3" style:family="presentation" style:parent-style-name="Encabezado_20_de_20_sección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cabezado_20_de_20_sección-outline4" style:display-name="Encabezado de sección-outline4" style:family="presentation" style:parent-style-name="Encabezado_20_de_20_sección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cabezado_20_de_20_sección-outline5" style:display-name="Encabezado de sección-outline5" style:family="presentation" style:parent-style-name="Encabezado_20_de_20_sección-outline4">
      <style:paragraph-properties fo:margin-top="0.1cm" fo:margin-bottom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 style:writing-mode="lr-tb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background" style:display-name="Dos objetos-background" style:family="presentation">
      <style:graphic-properties draw:stroke="none" draw:fill="solid" draw:fill-color="#15365b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 style:writing-mode="lr-tb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outline2" style:display-name="Dos objetos-outline2" style:family="presentation" style:parent-style-name="Dos_20_objetos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Dos_20_objetos-outline3" style:display-name="Dos objetos-outline3" style:family="presentation" style:parent-style-name="Dos_20_objetos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os_20_objetos-outline4" style:display-name="Dos objetos-outline4" style:family="presentation" style:parent-style-name="Dos_20_objetos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 style:writing-mode="lr-tb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background" style:family="presentation">
      <style:graphic-properties draw:stroke="none" draw:fill="solid" draw:fill-color="#15365b"/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false" style:shrink-to-fit="true" style:writing-mode="lr-tb">
        <text:list-style style:name="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outline2" style:family="presentation" style:parent-style-name="Comparación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mparación-outline3" style:family="presentation" style:parent-style-name="Comparación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mparación-outline4" style:family="presentation" style:parent-style-name="Comparación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mparación-outline5" style:family="presentation" style:parent-style-name="Comparación-outline4">
      <style:paragraph-properties fo:margin-top="0.1cm" fo:margin-bottom="0cm"/>
      <style:text-properties fo:font-size="20pt" style:font-size-asian="20pt" style:font-size-complex="20pt"/>
    </style:style>
    <style:style style:name="Comparación-outline6" style:family="presentation" style:parent-style-name="Comparación-outline5">
      <style:paragraph-properties fo:margin-top="0.1cm" fo:margin-bottom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top="0.1cm" fo:margin-bottom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top="0.1cm" fo:margin-bottom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top="0.1cm" fo:margin-bottom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 style:writing-mode="lr-tb">
        <text:list-style style:name="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background" style:display-name="Sólo el título-background" style:family="presentation">
      <style:graphic-properties draw:stroke="none" draw:fill="solid" draw:fill-color="#15365b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false" style:shrink-to-fit="true" style:writing-mode="lr-tb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outline2" style:display-name="Sólo el título-outline2" style:family="presentation" style:parent-style-name="Sólo_20_el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Sólo_20_el_20_título-outline3" style:display-name="Sólo el título-outline3" style:family="presentation" style:parent-style-name="Sólo_20_el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Sólo_20_el_20_título-outline4" style:display-name="Sólo el título-outline4" style:family="presentation" style:parent-style-name="Sólo_20_el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 style:writing-mode="lr-tb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background" style:display-name="En blanco-background" style:family="presentation">
      <style:graphic-properties draw:stroke="none" draw:fill="solid" draw:fill-color="#15365b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background" style:display-name="Contenido con título-background" style:family="presentation">
      <style:graphic-properties draw:stroke="none" draw:fill="solid" draw:fill-color="#15365b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false" style:shrink-to-fit="true" style:writing-mode="lr-tb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outline2" style:display-name="Contenido con título-outline2" style:family="presentation" style:parent-style-name="Contenido_20_con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ido_20_con_20_título-outline3" style:display-name="Contenido con título-outline3" style:family="presentation" style:parent-style-name="Contenido_20_con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ntenido_20_con_20_título-outline4" style:display-name="Contenido con título-outline4" style:family="presentation" style:parent-style-name="Contenido_20_con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 style:writing-mode="lr-tb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background" style:display-name="Imagen con título-background" style:family="presentation">
      <style:graphic-properties draw:stroke="none" draw:fill="solid" draw:fill-color="#15365b"/>
      <style:text-properties style:letter-kerning="true"/>
    </style:style>
    <style:style style:name="Imagen_20_con_20_título-backgroundobjects" style:display-name="Imagen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título-notes" style:display-name="Imagen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título-outline1" style:display-name="Imagen con título-outline1" style:family="presentation">
      <style:graphic-properties draw:stroke="none" draw:fill="none" draw:auto-grow-height="false" draw:fit-to-size="false" style:shrink-to-fit="true" style:writing-mode="lr-tb">
        <text:list-style style:name="Imagen_20_con_20_título-outline1" style:display-name="Imagen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outline2" style:display-name="Imagen con título-outline2" style:family="presentation" style:parent-style-name="Imagen_20_con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Imagen_20_con_20_título-outline3" style:display-name="Imagen con título-outline3" style:family="presentation" style:parent-style-name="Imagen_20_con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Imagen_20_con_20_título-outline4" style:display-name="Imagen con título-outline4" style:family="presentation" style:parent-style-name="Imagen_20_con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Imagen_20_con_20_título-outline5" style:display-name="Imagen con título-outline5" style:family="presentation" style:parent-style-name="Imagen_20_con_20_título-outline4">
      <style:paragraph-properties fo:margin-top="0.1cm" fo:margin-bottom="0cm"/>
      <style:text-properties fo:font-size="20pt" style:font-size-asian="20pt" style:font-size-complex="20pt"/>
    </style:style>
    <style:style style:name="Imagen_20_con_20_título-outline6" style:display-name="Imagen con título-outline6" style:family="presentation" style:parent-style-name="Imagen_20_con_20_título-outline5">
      <style:paragraph-properties fo:margin-top="0.1cm" fo:margin-bottom="0cm"/>
      <style:text-properties fo:font-size="20pt" style:font-size-asian="20pt" style:font-size-complex="20pt"/>
    </style:style>
    <style:style style:name="Imagen_20_con_20_título-outline7" style:display-name="Imagen con título-outline7" style:family="presentation" style:parent-style-name="Imagen_20_con_20_título-outline6">
      <style:paragraph-properties fo:margin-top="0.1cm" fo:margin-bottom="0cm"/>
      <style:text-properties fo:font-size="20pt" style:font-size-asian="20pt" style:font-size-complex="20pt"/>
    </style:style>
    <style:style style:name="Imagen_20_con_20_título-outline8" style:display-name="Imagen con título-outline8" style:family="presentation" style:parent-style-name="Imagen_20_con_20_título-outline7">
      <style:paragraph-properties fo:margin-top="0.1cm" fo:margin-bottom="0cm"/>
      <style:text-properties fo:font-size="20pt" style:font-size-asian="20pt" style:font-size-complex="20pt"/>
    </style:style>
    <style:style style:name="Imagen_20_con_20_título-outline9" style:display-name="Imagen con título-outline9" style:family="presentation" style:parent-style-name="Imagen_20_con_20_título-outline8">
      <style:paragraph-properties fo:margin-top="0.1cm" fo:margin-bottom="0cm"/>
      <style:text-properties fo:font-size="20pt" style:font-size-asian="20pt" style:font-size-complex="20pt"/>
    </style:style>
    <style:style style:name="Imagen_20_con_20_título-subtitle" style:display-name="Imagen con título-subtitle" style:family="presentation">
      <style:graphic-properties draw:stroke="none" draw:fill="none" draw:textarea-vertical-align="middle">
        <text:list-style style:name="Imagen_20_con_20_título-subtitle" style:display-name="Imagen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-title" style:display-name="Imagen con título-title" style:family="presentation">
      <style:graphic-properties draw:stroke="none" draw:fill="none" draw:textarea-vertical-align="middle" style:writing-mode="lr-tb">
        <text:list-style style:name="Imagen_20_con_20_título-title" style:display-name="Imagen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-background" style:display-name="Título y objetos_-background" style:family="presentation">
      <style:graphic-properties draw:stroke="none" draw:fill="solid" draw:fill-color="#15365b"/>
      <style:text-properties style:letter-kerning="true"/>
    </style:style>
    <style:style style:name="Título_20_y_20_objetos_5f_-backgroundobjects" style:display-name="Título y 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-notes" style:display-name="Título y 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-outline1" style:display-name="Título y objetos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-outline1" style:display-name="Título y objetos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-outline2" style:display-name="Título y objetos_-outline2" style:family="presentation" style:parent-style-name="Título_20_y_20_objetos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-outline3" style:display-name="Título y objetos_-outline3" style:family="presentation" style:parent-style-name="Título_20_y_20_objetos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-outline4" style:display-name="Título y objetos_-outline4" style:family="presentation" style:parent-style-name="Título_20_y_20_objetos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-outline5" style:display-name="Título y objetos_-outline5" style:family="presentation" style:parent-style-name="Título_20_y_20_objetos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-outline6" style:display-name="Título y objetos_-outline6" style:family="presentation" style:parent-style-name="Título_20_y_20_objetos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-outline7" style:display-name="Título y objetos_-outline7" style:family="presentation" style:parent-style-name="Título_20_y_20_objetos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-outline8" style:display-name="Título y objetos_-outline8" style:family="presentation" style:parent-style-name="Título_20_y_20_objetos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-outline9" style:display-name="Título y objetos_-outline9" style:family="presentation" style:parent-style-name="Título_20_y_20_objetos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-subtitle" style:display-name="Título y objetos_-subtitle" style:family="presentation">
      <style:graphic-properties draw:stroke="none" draw:fill="none" draw:textarea-vertical-align="middle">
        <text:list-style style:name="Título_20_y_20_objetos_5f_-subtitle" style:display-name="Título y objetos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-title" style:display-name="Título y objetos_-title" style:family="presentation">
      <style:graphic-properties draw:stroke="none" draw:fill="none" draw:textarea-vertical-align="middle" style:writing-mode="lr-tb">
        <text:list-style style:name="Título_20_y_20_objetos_5f_-title" style:display-name="Título y objetos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-background" style:display-name="Título y objetos__-background" style:family="presentation">
      <style:graphic-properties draw:stroke="none" draw:fill="solid" draw:fill-color="#15365b"/>
      <style:text-properties style:letter-kerning="true"/>
    </style:style>
    <style:style style:name="Título_20_y_20_objetos_5f__5f_-backgroundobjects" style:display-name="Título y 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-notes" style:display-name="Título y 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-outline1" style:display-name="Título y objetos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-outline1" style:display-name="Título y objetos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-outline2" style:display-name="Título y objetos__-outline2" style:family="presentation" style:parent-style-name="Título_20_y_20_objetos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-outline3" style:display-name="Título y objetos__-outline3" style:family="presentation" style:parent-style-name="Título_20_y_20_objetos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-outline4" style:display-name="Título y objetos__-outline4" style:family="presentation" style:parent-style-name="Título_20_y_20_objetos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-outline5" style:display-name="Título y objetos__-outline5" style:family="presentation" style:parent-style-name="Título_20_y_20_objetos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6" style:display-name="Título y objetos__-outline6" style:family="presentation" style:parent-style-name="Título_20_y_20_objetos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7" style:display-name="Título y objetos__-outline7" style:family="presentation" style:parent-style-name="Título_20_y_20_objetos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8" style:display-name="Título y objetos__-outline8" style:family="presentation" style:parent-style-name="Título_20_y_20_objetos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9" style:display-name="Título y objetos__-outline9" style:family="presentation" style:parent-style-name="Título_20_y_20_objetos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-subtitle" style:display-name="Título y objetos__-subtitle" style:family="presentation">
      <style:graphic-properties draw:stroke="none" draw:fill="none" draw:textarea-vertical-align="middle">
        <text:list-style style:name="Título_20_y_20_objetos_5f__5f_-subtitle" style:display-name="Título y objetos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-title" style:display-name="Título y objetos__-title" style:family="presentation">
      <style:graphic-properties draw:stroke="none" draw:fill="none" draw:textarea-vertical-align="middle" style:writing-mode="lr-tb">
        <text:list-style style:name="Título_20_y_20_objetos_5f__5f_-title" style:display-name="Título y objetos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-background" style:display-name="Título y objetos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-backgroundobjects" style:display-name="Título y objetos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-notes" style:display-name="Título y objetos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-outline1" style:display-name="Título y objetos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-outline1" style:display-name="Título y objetos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-outline2" style:display-name="Título y objetos___-outline2" style:family="presentation" style:parent-style-name="Título_20_y_20_objetos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-outline3" style:display-name="Título y objetos___-outline3" style:family="presentation" style:parent-style-name="Título_20_y_20_objetos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-outline4" style:display-name="Título y objetos___-outline4" style:family="presentation" style:parent-style-name="Título_20_y_20_objetos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-outline5" style:display-name="Título y objetos___-outline5" style:family="presentation" style:parent-style-name="Título_20_y_20_objetos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6" style:display-name="Título y objetos___-outline6" style:family="presentation" style:parent-style-name="Título_20_y_20_objetos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7" style:display-name="Título y objetos___-outline7" style:family="presentation" style:parent-style-name="Título_20_y_20_objetos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8" style:display-name="Título y objetos___-outline8" style:family="presentation" style:parent-style-name="Título_20_y_20_objetos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9" style:display-name="Título y objetos___-outline9" style:family="presentation" style:parent-style-name="Título_20_y_20_objetos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-subtitle" style:display-name="Título y objetos___-subtitle" style:family="presentation">
      <style:graphic-properties draw:stroke="none" draw:fill="none" draw:textarea-vertical-align="middle">
        <text:list-style style:name="Título_20_y_20_objetos_5f__5f__5f_-subtitle" style:display-name="Título y objetos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-title" style:display-name="Título y objetos___-title" style:family="presentation">
      <style:graphic-properties draw:stroke="none" draw:fill="none" draw:textarea-vertical-align="middle" style:writing-mode="lr-tb">
        <text:list-style style:name="Título_20_y_20_objetos_5f__5f__5f_-title" style:display-name="Título y objetos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-background" style:display-name="Título y objetos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-backgroundobjects" style:display-name="Título y objetos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-notes" style:display-name="Título y objetos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-outline1" style:display-name="Título y objetos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-outline1" style:display-name="Título y objetos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-outline2" style:display-name="Título y objetos____-outline2" style:family="presentation" style:parent-style-name="Título_20_y_20_objetos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-outline3" style:display-name="Título y objetos____-outline3" style:family="presentation" style:parent-style-name="Título_20_y_20_objetos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-outline4" style:display-name="Título y objetos____-outline4" style:family="presentation" style:parent-style-name="Título_20_y_20_objetos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-outline5" style:display-name="Título y objetos____-outline5" style:family="presentation" style:parent-style-name="Título_20_y_20_objetos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6" style:display-name="Título y objetos____-outline6" style:family="presentation" style:parent-style-name="Título_20_y_20_objetos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7" style:display-name="Título y objetos____-outline7" style:family="presentation" style:parent-style-name="Título_20_y_20_objetos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8" style:display-name="Título y objetos____-outline8" style:family="presentation" style:parent-style-name="Título_20_y_20_objetos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9" style:display-name="Título y objetos____-outline9" style:family="presentation" style:parent-style-name="Título_20_y_20_objetos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subtitle" style:display-name="Título y objetos____-subtitle" style:family="presentation">
      <style:graphic-properties draw:stroke="none" draw:fill="none" draw:textarea-vertical-align="middle">
        <text:list-style style:name="Título_20_y_20_objetos_5f__5f__5f__5f_-subtitle" style:display-name="Título y objetos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-title" style:display-name="Título y objetos____-title" style:family="presentation">
      <style:graphic-properties draw:stroke="none" draw:fill="none" draw:textarea-vertical-align="middle" style:writing-mode="lr-tb">
        <text:list-style style:name="Título_20_y_20_objetos_5f__5f__5f__5f_-title" style:display-name="Título y objetos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-background" style:display-name="Título y objetos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-backgroundobjects" style:display-name="Título y objetos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-notes" style:display-name="Título y objetos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-outline1" style:display-name="Título y objetos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-outline1" style:display-name="Título y objetos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-outline2" style:display-name="Título y objetos_____-outline2" style:family="presentation" style:parent-style-name="Título_20_y_20_objetos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-outline3" style:display-name="Título y objetos_____-outline3" style:family="presentation" style:parent-style-name="Título_20_y_20_objetos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-outline4" style:display-name="Título y objetos_____-outline4" style:family="presentation" style:parent-style-name="Título_20_y_20_objetos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-outline5" style:display-name="Título y objetos_____-outline5" style:family="presentation" style:parent-style-name="Título_20_y_20_objetos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6" style:display-name="Título y objetos_____-outline6" style:family="presentation" style:parent-style-name="Título_20_y_20_objetos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7" style:display-name="Título y objetos_____-outline7" style:family="presentation" style:parent-style-name="Título_20_y_20_objetos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8" style:display-name="Título y objetos_____-outline8" style:family="presentation" style:parent-style-name="Título_20_y_20_objetos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9" style:display-name="Título y objetos_____-outline9" style:family="presentation" style:parent-style-name="Título_20_y_20_objetos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subtitle" style:display-name="Título y objetos_____-subtitle" style:family="presentation">
      <style:graphic-properties draw:stroke="none" draw:fill="none" draw:textarea-vertical-align="middle">
        <text:list-style style:name="Título_20_y_20_objetos_5f__5f__5f__5f__5f_-subtitle" style:display-name="Título y objetos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-title" style:display-name="Título y objetos_____-title" style:family="presentation">
      <style:graphic-properties draw:stroke="none" draw:fill="none" draw:textarea-vertical-align="middle" style:writing-mode="lr-tb">
        <text:list-style style:name="Título_20_y_20_objetos_5f__5f__5f__5f__5f_-title" style:display-name="Título y objetos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-background" style:display-name="Título y objetos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-backgroundobjects" style:display-name="Título y objetos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-notes" style:display-name="Título y objetos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-outline1" style:display-name="Título y objetos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-outline1" style:display-name="Título y objetos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-outline2" style:display-name="Título y objetos______-outline2" style:family="presentation" style:parent-style-name="Título_20_y_20_objetos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-outline3" style:display-name="Título y objetos______-outline3" style:family="presentation" style:parent-style-name="Título_20_y_20_objetos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-outline4" style:display-name="Título y objetos______-outline4" style:family="presentation" style:parent-style-name="Título_20_y_20_objetos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-outline5" style:display-name="Título y objetos______-outline5" style:family="presentation" style:parent-style-name="Título_20_y_20_objetos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6" style:display-name="Título y objetos______-outline6" style:family="presentation" style:parent-style-name="Título_20_y_20_objetos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7" style:display-name="Título y objetos______-outline7" style:family="presentation" style:parent-style-name="Título_20_y_20_objetos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8" style:display-name="Título y objetos______-outline8" style:family="presentation" style:parent-style-name="Título_20_y_20_objetos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9" style:display-name="Título y objetos______-outline9" style:family="presentation" style:parent-style-name="Título_20_y_20_objetos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subtitle" style:display-name="Título y objetos______-subtitle" style:family="presentation">
      <style:graphic-properties draw:stroke="none" draw:fill="none" draw:textarea-vertical-align="middle">
        <text:list-style style:name="Título_20_y_20_objetos_5f__5f__5f__5f__5f__5f_-subtitle" style:display-name="Título y objetos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-title" style:display-name="Título y objetos______-title" style:family="presentation">
      <style:graphic-properties draw:stroke="none" draw:fill="none" draw:textarea-vertical-align="middle" style:writing-mode="lr-tb">
        <text:list-style style:name="Título_20_y_20_objetos_5f__5f__5f__5f__5f__5f_-title" style:display-name="Título y objetos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-background" style:display-name="Título y objetos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-backgroundobjects" style:display-name="Título y objetos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-notes" style:display-name="Título y objetos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-outline1" style:display-name="Título y objetos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-outline1" style:display-name="Título y objetos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-outline2" style:display-name="Título y objetos_______-outline2" style:family="presentation" style:parent-style-name="Título_20_y_20_objetos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-outline3" style:display-name="Título y objetos_______-outline3" style:family="presentation" style:parent-style-name="Título_20_y_20_objetos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-outline4" style:display-name="Título y objetos_______-outline4" style:family="presentation" style:parent-style-name="Título_20_y_20_objetos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-outline5" style:display-name="Título y objetos_______-outline5" style:family="presentation" style:parent-style-name="Título_20_y_20_objetos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outline6" style:display-name="Título y objetos_______-outline6" style:family="presentation" style:parent-style-name="Título_20_y_20_objetos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outline7" style:display-name="Título y objetos_______-outline7" style:family="presentation" style:parent-style-name="Título_20_y_20_objetos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outline8" style:display-name="Título y objetos_______-outline8" style:family="presentation" style:parent-style-name="Título_20_y_20_objetos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outline9" style:display-name="Título y objetos_______-outline9" style:family="presentation" style:parent-style-name="Título_20_y_20_objetos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subtitle" style:display-name="Título y objetos_______-subtitle" style:family="presentation">
      <style:graphic-properties draw:stroke="none" draw:fill="none" draw:textarea-vertical-align="middle">
        <text:list-style style:name="Título_20_y_20_objetos_5f__5f__5f__5f__5f__5f__5f_-subtitle" style:display-name="Título y objetos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-title" style:display-name="Título y objetos_______-title" style:family="presentation">
      <style:graphic-properties draw:stroke="none" draw:fill="none" draw:textarea-vertical-align="middle" style:writing-mode="lr-tb">
        <text:list-style style:name="Título_20_y_20_objetos_5f__5f__5f__5f__5f__5f__5f_-title" style:display-name="Título y objetos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-background" style:display-name="Título y objetos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-backgroundobjects" style:display-name="Título y objetos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-notes" style:display-name="Título y objetos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-outline1" style:display-name="Título y objetos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-outline1" style:display-name="Título y objetos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-outline2" style:display-name="Título y objetos________-outline2" style:family="presentation" style:parent-style-name="Título_20_y_20_objetos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-outline3" style:display-name="Título y objetos________-outline3" style:family="presentation" style:parent-style-name="Título_20_y_20_objetos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-outline4" style:display-name="Título y objetos________-outline4" style:family="presentation" style:parent-style-name="Título_20_y_20_objetos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-outline5" style:display-name="Título y objetos________-outline5" style:family="presentation" style:parent-style-name="Título_20_y_20_objetos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outline6" style:display-name="Título y objetos________-outline6" style:family="presentation" style:parent-style-name="Título_20_y_20_objetos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outline7" style:display-name="Título y objetos________-outline7" style:family="presentation" style:parent-style-name="Título_20_y_20_objetos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outline8" style:display-name="Título y objetos________-outline8" style:family="presentation" style:parent-style-name="Título_20_y_20_objetos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outline9" style:display-name="Título y objetos________-outline9" style:family="presentation" style:parent-style-name="Título_20_y_20_objetos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subtitle" style:display-name="Título y objetos________-subtitle" style:family="presentation">
      <style:graphic-properties draw:stroke="none" draw:fill="none" draw:textarea-vertical-align="middle">
        <text:list-style style:name="Título_20_y_20_objetos_5f__5f__5f__5f__5f__5f__5f__5f_-subtitle" style:display-name="Título y objetos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-title" style:display-name="Título y objetos________-title" style:family="presentation">
      <style:graphic-properties draw:stroke="none" draw:fill="none" draw:textarea-vertical-align="middle" style:writing-mode="lr-tb">
        <text:list-style style:name="Título_20_y_20_objetos_5f__5f__5f__5f__5f__5f__5f__5f_-title" style:display-name="Título y objetos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-background" style:display-name="Título y objetos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-backgroundobjects" style:display-name="Título y objetos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-notes" style:display-name="Título y objetos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-outline1" style:display-name="Título y objetos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-outline1" style:display-name="Título y objetos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-outline2" style:display-name="Título y objetos_________-outline2" style:family="presentation" style:parent-style-name="Título_20_y_20_objetos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-outline3" style:display-name="Título y objetos_________-outline3" style:family="presentation" style:parent-style-name="Título_20_y_20_objetos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-outline4" style:display-name="Título y objetos_________-outline4" style:family="presentation" style:parent-style-name="Título_20_y_20_objetos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-outline5" style:display-name="Título y objetos_________-outline5" style:family="presentation" style:parent-style-name="Título_20_y_20_objetos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outline6" style:display-name="Título y objetos_________-outline6" style:family="presentation" style:parent-style-name="Título_20_y_20_objetos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outline7" style:display-name="Título y objetos_________-outline7" style:family="presentation" style:parent-style-name="Título_20_y_20_objetos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outline8" style:display-name="Título y objetos_________-outline8" style:family="presentation" style:parent-style-name="Título_20_y_20_objetos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outline9" style:display-name="Título y objetos_________-outline9" style:family="presentation" style:parent-style-name="Título_20_y_20_objetos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subtitle" style:display-name="Título y objetos_________-subtitle" style:family="presentation">
      <style:graphic-properties draw:stroke="none" draw:fill="none" draw:textarea-vertical-align="middle">
        <text:list-style style:name="Título_20_y_20_objetos_5f__5f__5f__5f__5f__5f__5f__5f__5f_-subtitle" style:display-name="Título y objetos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-title" style:display-name="Título y objetos_________-title" style:family="presentation">
      <style:graphic-properties draw:stroke="none" draw:fill="none" draw:textarea-vertical-align="middle" style:writing-mode="lr-tb">
        <text:list-style style:name="Título_20_y_20_objetos_5f__5f__5f__5f__5f__5f__5f__5f__5f_-title" style:display-name="Título y objetos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-background" style:display-name="Título y objetos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-backgroundobjects" style:display-name="Título y objetos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-notes" style:display-name="Título y objetos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-outline1" style:display-name="Título y objetos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-outline1" style:display-name="Título y objetos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-outline2" style:display-name="Título y objetos__________-outline2" style:family="presentation" style:parent-style-name="Título_20_y_20_objetos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-outline3" style:display-name="Título y objetos__________-outline3" style:family="presentation" style:parent-style-name="Título_20_y_20_objetos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-outline4" style:display-name="Título y objetos__________-outline4" style:family="presentation" style:parent-style-name="Título_20_y_20_objetos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-outline5" style:display-name="Título y objetos__________-outline5" style:family="presentation" style:parent-style-name="Título_20_y_20_objetos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-outline6" style:display-name="Título y objetos__________-outline6" style:family="presentation" style:parent-style-name="Título_20_y_20_objetos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-outline7" style:display-name="Título y objetos__________-outline7" style:family="presentation" style:parent-style-name="Título_20_y_20_objetos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-outline8" style:display-name="Título y objetos__________-outline8" style:family="presentation" style:parent-style-name="Título_20_y_20_objetos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-outline9" style:display-name="Título y objetos__________-outline9" style:family="presentation" style:parent-style-name="Título_20_y_20_objetos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-subtitle" style:display-name="Título y objetos__________-subtitle" style:family="presentation">
      <style:graphic-properties draw:stroke="none" draw:fill="none" draw:textarea-vertical-align="middle">
        <text:list-style style:name="Título_20_y_20_objetos_5f__5f__5f__5f__5f__5f__5f__5f__5f__5f_-subtitle" style:display-name="Título y objetos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-title" style:display-name="Título y objetos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-title" style:display-name="Título y objetos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-background" style:display-name="Título y objetos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-backgroundobjects" style:display-name="Título y objetos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-notes" style:display-name="Título y objetos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-outline1" style:display-name="Título y objetos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-outline1" style:display-name="Título y objetos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-outline2" style:display-name="Título y objetos___________-outline2" style:family="presentation" style:parent-style-name="Título_20_y_20_objetos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-outline3" style:display-name="Título y objetos___________-outline3" style:family="presentation" style:parent-style-name="Título_20_y_20_objetos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-outline4" style:display-name="Título y objetos___________-outline4" style:family="presentation" style:parent-style-name="Título_20_y_20_objetos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-outline5" style:display-name="Título y objetos___________-outline5" style:family="presentation" style:parent-style-name="Título_20_y_20_objetos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-outline6" style:display-name="Título y objetos___________-outline6" style:family="presentation" style:parent-style-name="Título_20_y_20_objetos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-outline7" style:display-name="Título y objetos___________-outline7" style:family="presentation" style:parent-style-name="Título_20_y_20_objetos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-outline8" style:display-name="Título y objetos___________-outline8" style:family="presentation" style:parent-style-name="Título_20_y_20_objetos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-outline9" style:display-name="Título y objetos___________-outline9" style:family="presentation" style:parent-style-name="Título_20_y_20_objetos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-subtitle" style:display-name="Título y objetos___________-subtitle" style:family="presentation">
      <style:graphic-properties draw:stroke="none" draw:fill="none" draw:textarea-vertical-align="middle">
        <text:list-style style:name="Título_20_y_20_objetos_5f__5f__5f__5f__5f__5f__5f__5f__5f__5f__5f_-subtitle" style:display-name="Título y objetos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-title" style:display-name="Título y objetos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-title" style:display-name="Título y objetos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-background" style:display-name="Título y objetos_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_5f_-backgroundobjects" style:display-name="Título y objetos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_5f_-notes" style:display-name="Título y objetos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-outline1" style:display-name="Título y objetos_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_5f_-outline1" style:display-name="Título y objetos_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-outline2" style:display-name="Título y objetos____________-outline2" style:family="presentation" style:parent-style-name="Título_20_y_20_objetos_5f_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-outline3" style:display-name="Título y objetos____________-outline3" style:family="presentation" style:parent-style-name="Título_20_y_20_objetos_5f_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-outline4" style:display-name="Título y objetos____________-outline4" style:family="presentation" style:parent-style-name="Título_20_y_20_objetos_5f_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-outline5" style:display-name="Título y objetos____________-outline5" style:family="presentation" style:parent-style-name="Título_20_y_20_objetos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-outline6" style:display-name="Título y objetos____________-outline6" style:family="presentation" style:parent-style-name="Título_20_y_20_objetos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-outline7" style:display-name="Título y objetos____________-outline7" style:family="presentation" style:parent-style-name="Título_20_y_20_objetos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-outline8" style:display-name="Título y objetos____________-outline8" style:family="presentation" style:parent-style-name="Título_20_y_20_objetos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-outline9" style:display-name="Título y objetos____________-outline9" style:family="presentation" style:parent-style-name="Título_20_y_20_objetos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-subtitle" style:display-name="Título y objetos____________-subtitle" style:family="presentation">
      <style:graphic-properties draw:stroke="none" draw:fill="none" draw:textarea-vertical-align="middle">
        <text:list-style style:name="Título_20_y_20_objetos_5f__5f__5f__5f__5f__5f__5f__5f__5f__5f__5f__5f_-subtitle" style:display-name="Título y objetos_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-title" style:display-name="Título y objetos_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_5f_-title" style:display-name="Título y objetos_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-background" style:display-name="Título y objetos__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_5f__5f_-backgroundobjects" style:display-name="Título y objetos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_5f__5f_-notes" style:display-name="Título y objetos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-outline1" style:display-name="Título y objetos__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_5f__5f_-outline1" style:display-name="Título y objetos__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-outline2" style:display-name="Título y objetos_____________-outline2" style:family="presentation" style:parent-style-name="Título_20_y_20_objetos_5f__5f_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-outline3" style:display-name="Título y objetos_____________-outline3" style:family="presentation" style:parent-style-name="Título_20_y_20_objetos_5f__5f_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-outline4" style:display-name="Título y objetos_____________-outline4" style:family="presentation" style:parent-style-name="Título_20_y_20_objetos_5f__5f_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-outline5" style:display-name="Título y objetos_____________-outline5" style:family="presentation" style:parent-style-name="Título_20_y_20_objetos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-outline6" style:display-name="Título y objetos_____________-outline6" style:family="presentation" style:parent-style-name="Título_20_y_20_objetos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-outline7" style:display-name="Título y objetos_____________-outline7" style:family="presentation" style:parent-style-name="Título_20_y_20_objetos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-outline8" style:display-name="Título y objetos_____________-outline8" style:family="presentation" style:parent-style-name="Título_20_y_20_objetos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-outline9" style:display-name="Título y objetos_____________-outline9" style:family="presentation" style:parent-style-name="Título_20_y_20_objetos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-subtitle" style:display-name="Título y objetos_____________-subtitle" style:family="presentation">
      <style:graphic-properties draw:stroke="none" draw:fill="none" draw:textarea-vertical-align="middle">
        <text:list-style style:name="Título_20_y_20_objetos_5f__5f__5f__5f__5f__5f__5f__5f__5f__5f__5f__5f__5f_-subtitle" style:display-name="Título y objetos__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-title" style:display-name="Título y objetos__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_5f__5f_-title" style:display-name="Título y objetos__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-background" style:display-name="Título y objetos___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_5f__5f__5f_-backgroundobjects" style:display-name="Título y objetos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_5f__5f__5f_-notes" style:display-name="Título y objetos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-outline1" style:display-name="Título y objetos___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_5f__5f__5f_-outline1" style:display-name="Título y objetos___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-outline2" style:display-name="Título y objetos______________-outline2" style:family="presentation" style:parent-style-name="Título_20_y_20_objetos_5f__5f__5f_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-outline3" style:display-name="Título y objetos______________-outline3" style:family="presentation" style:parent-style-name="Título_20_y_20_objetos_5f__5f__5f_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-outline4" style:display-name="Título y objetos______________-outline4" style:family="presentation" style:parent-style-name="Título_20_y_20_objetos_5f__5f__5f_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-outline5" style:display-name="Título y objetos______________-outline5" style:family="presentation" style:parent-style-name="Título_20_y_20_objetos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-outline6" style:display-name="Título y objetos______________-outline6" style:family="presentation" style:parent-style-name="Título_20_y_20_objetos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-outline7" style:display-name="Título y objetos______________-outline7" style:family="presentation" style:parent-style-name="Título_20_y_20_objetos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-outline8" style:display-name="Título y objetos______________-outline8" style:family="presentation" style:parent-style-name="Título_20_y_20_objetos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-outline9" style:display-name="Título y objetos______________-outline9" style:family="presentation" style:parent-style-name="Título_20_y_20_objetos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-subtitle" style:display-name="Título y objetos______________-subtitle" style:family="presentation">
      <style:graphic-properties draw:stroke="none" draw:fill="none" draw:textarea-vertical-align="middle">
        <text:list-style style:name="Título_20_y_20_objetos_5f__5f__5f__5f__5f__5f__5f__5f__5f__5f__5f__5f__5f__5f_-subtitle" style:display-name="Título y objetos___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-title" style:display-name="Título y objetos___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_5f__5f__5f_-title" style:display-name="Título y objetos___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-background" style:display-name="Título y objetos____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_5f__5f__5f__5f_-backgroundobjects" style:display-name="Título y objetos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_5f__5f__5f__5f_-notes" style:display-name="Título y objetos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-outline1" style:display-name="Título y objetos____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_5f__5f__5f__5f_-outline1" style:display-name="Título y objetos____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-outline2" style:display-name="Título y objetos_______________-outline2" style:family="presentation" style:parent-style-name="Título_20_y_20_objetos_5f__5f__5f__5f_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-outline3" style:display-name="Título y objetos_______________-outline3" style:family="presentation" style:parent-style-name="Título_20_y_20_objetos_5f__5f__5f__5f_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-outline4" style:display-name="Título y objetos_______________-outline4" style:family="presentation" style:parent-style-name="Título_20_y_20_objetos_5f__5f__5f__5f_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-outline5" style:display-name="Título y objetos_______________-outline5" style:family="presentation" style:parent-style-name="Título_20_y_20_objetos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-outline6" style:display-name="Título y objetos_______________-outline6" style:family="presentation" style:parent-style-name="Título_20_y_20_objetos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-outline7" style:display-name="Título y objetos_______________-outline7" style:family="presentation" style:parent-style-name="Título_20_y_20_objetos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-outline8" style:display-name="Título y objetos_______________-outline8" style:family="presentation" style:parent-style-name="Título_20_y_20_objetos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-outline9" style:display-name="Título y objetos_______________-outline9" style:family="presentation" style:parent-style-name="Título_20_y_20_objetos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-subtitle" style:display-name="Título y objetos_______________-subtitle" style:family="presentation">
      <style:graphic-properties draw:stroke="none" draw:fill="none" draw:textarea-vertical-align="middle">
        <text:list-style style:name="Título_20_y_20_objetos_5f__5f__5f__5f__5f__5f__5f__5f__5f__5f__5f__5f__5f__5f__5f_-subtitle" style:display-name="Título y objetos____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-title" style:display-name="Título y objetos____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_5f__5f__5f__5f_-title" style:display-name="Título y objetos____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_5f_-background" style:display-name="Título y objetos_____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_5f__5f__5f__5f__5f_-backgroundobjects" style:display-name="Título y objetos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_5f__5f__5f__5f__5f_-notes" style:display-name="Título y objetos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_5f_-outline1" style:display-name="Título y objetos_____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_5f__5f__5f__5f__5f_-outline1" style:display-name="Título y objetos_____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_5f_-outline2" style:display-name="Título y objetos________________-outline2" style:family="presentation" style:parent-style-name="Título_20_y_20_objetos_5f__5f__5f__5f__5f_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-outline3" style:display-name="Título y objetos________________-outline3" style:family="presentation" style:parent-style-name="Título_20_y_20_objetos_5f__5f__5f__5f__5f_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-outline4" style:display-name="Título y objetos________________-outline4" style:family="presentation" style:parent-style-name="Título_20_y_20_objetos_5f__5f__5f__5f__5f_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-outline5" style:display-name="Título y objetos________________-outline5" style:family="presentation" style:parent-style-name="Título_20_y_20_objetos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-outline6" style:display-name="Título y objetos________________-outline6" style:family="presentation" style:parent-style-name="Título_20_y_20_objetos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-outline7" style:display-name="Título y objetos________________-outline7" style:family="presentation" style:parent-style-name="Título_20_y_20_objetos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-outline8" style:display-name="Título y objetos________________-outline8" style:family="presentation" style:parent-style-name="Título_20_y_20_objetos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-outline9" style:display-name="Título y objetos________________-outline9" style:family="presentation" style:parent-style-name="Título_20_y_20_objetos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-subtitle" style:display-name="Título y objetos________________-subtitle" style:family="presentation">
      <style:graphic-properties draw:stroke="none" draw:fill="none" draw:textarea-vertical-align="middle">
        <text:list-style style:name="Título_20_y_20_objetos_5f__5f__5f__5f__5f__5f__5f__5f__5f__5f__5f__5f__5f__5f__5f__5f_-subtitle" style:display-name="Título y objetos_____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_5f_-title" style:display-name="Título y objetos_____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_5f__5f__5f__5f__5f_-title" style:display-name="Título y objetos_____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_5f__5f_-background" style:display-name="Título y objetos______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_5f__5f__5f__5f__5f__5f_-backgroundobjects" style:display-name="Título y objetos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_5f__5f__5f__5f__5f__5f_-notes" style:display-name="Título y objetos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_5f__5f_-outline1" style:display-name="Título y objetos______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_5f__5f__5f__5f__5f__5f_-outline1" style:display-name="Título y objetos______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_5f__5f_-outline2" style:display-name="Título y objetos_________________-outline2" style:family="presentation" style:parent-style-name="Título_20_y_20_objetos_5f__5f__5f__5f__5f__5f_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_5f_-outline3" style:display-name="Título y objetos_________________-outline3" style:family="presentation" style:parent-style-name="Título_20_y_20_objetos_5f__5f__5f__5f__5f__5f_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_5f_-outline4" style:display-name="Título y objetos_________________-outline4" style:family="presentation" style:parent-style-name="Título_20_y_20_objetos_5f__5f__5f__5f__5f__5f_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_5f_-outline5" style:display-name="Título y objetos_________________-outline5" style:family="presentation" style:parent-style-name="Título_20_y_20_objetos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-outline6" style:display-name="Título y objetos_________________-outline6" style:family="presentation" style:parent-style-name="Título_20_y_20_objetos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-outline7" style:display-name="Título y objetos_________________-outline7" style:family="presentation" style:parent-style-name="Título_20_y_20_objetos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-outline8" style:display-name="Título y objetos_________________-outline8" style:family="presentation" style:parent-style-name="Título_20_y_20_objetos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-outline9" style:display-name="Título y objetos_________________-outline9" style:family="presentation" style:parent-style-name="Título_20_y_20_objetos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-subtitle" style:display-name="Título y objetos_________________-subtitle" style:family="presentation">
      <style:graphic-properties draw:stroke="none" draw:fill="none" draw:textarea-vertical-align="middle">
        <text:list-style style:name="Título_20_y_20_objetos_5f__5f__5f__5f__5f__5f__5f__5f__5f__5f__5f__5f__5f__5f__5f__5f__5f_-subtitle" style:display-name="Título y objetos______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_5f__5f_-title" style:display-name="Título y objetos______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_5f__5f__5f__5f__5f__5f_-title" style:display-name="Título y objetos______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_5f__5f__5f_-background" style:display-name="Título y objetos_______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_5f__5f__5f__5f__5f__5f__5f_-backgroundobjects" style:display-name="Título y objetos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_5f__5f__5f__5f__5f__5f__5f_-notes" style:display-name="Título y objetos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_5f__5f__5f_-outline1" style:display-name="Título y objetos_______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_5f__5f__5f__5f__5f__5f__5f_-outline1" style:display-name="Título y objetos_______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_5f__5f__5f_-outline2" style:display-name="Título y objetos__________________-outline2" style:family="presentation" style:parent-style-name="Título_20_y_20_objetos_5f__5f__5f__5f__5f__5f__5f_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_5f__5f_-outline3" style:display-name="Título y objetos__________________-outline3" style:family="presentation" style:parent-style-name="Título_20_y_20_objetos_5f__5f__5f__5f__5f__5f__5f_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_5f__5f_-outline4" style:display-name="Título y objetos__________________-outline4" style:family="presentation" style:parent-style-name="Título_20_y_20_objetos_5f__5f__5f__5f__5f__5f__5f_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_5f__5f_-outline5" style:display-name="Título y objetos__________________-outline5" style:family="presentation" style:parent-style-name="Título_20_y_20_objetos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-outline6" style:display-name="Título y objetos__________________-outline6" style:family="presentation" style:parent-style-name="Título_20_y_20_objetos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-outline7" style:display-name="Título y objetos__________________-outline7" style:family="presentation" style:parent-style-name="Título_20_y_20_objetos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-outline8" style:display-name="Título y objetos__________________-outline8" style:family="presentation" style:parent-style-name="Título_20_y_20_objetos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-outline9" style:display-name="Título y objetos__________________-outline9" style:family="presentation" style:parent-style-name="Título_20_y_20_objetos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-subtitle" style:display-name="Título y objetos__________________-subtitle" style:family="presentation">
      <style:graphic-properties draw:stroke="none" draw:fill="none" draw:textarea-vertical-align="middle">
        <text:list-style style:name="Título_20_y_20_objetos_5f__5f__5f__5f__5f__5f__5f__5f__5f__5f__5f__5f__5f__5f__5f__5f__5f__5f_-subtitle" style:display-name="Título y objetos_______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_5f__5f__5f_-title" style:display-name="Título y objetos_______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_5f__5f__5f__5f__5f__5f__5f_-title" style:display-name="Título y objetos_______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_5f__5f__5f__5f_-background" style:display-name="Título y objetos________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_5f__5f__5f__5f__5f__5f__5f__5f_-backgroundobjects" style:display-name="Título y objetos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_5f__5f__5f__5f__5f__5f__5f__5f_-notes" style:display-name="Título y objetos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_5f__5f__5f__5f_-outline1" style:display-name="Título y objetos________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_5f__5f__5f__5f__5f__5f__5f__5f_-outline1" style:display-name="Título y objetos________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_5f__5f__5f__5f_-outline2" style:display-name="Título y objetos___________________-outline2" style:family="presentation" style:parent-style-name="Título_20_y_20_objetos_5f__5f__5f__5f__5f__5f__5f__5f_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_5f__5f__5f_-outline3" style:display-name="Título y objetos___________________-outline3" style:family="presentation" style:parent-style-name="Título_20_y_20_objetos_5f__5f__5f__5f__5f__5f__5f__5f_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_5f__5f__5f_-outline4" style:display-name="Título y objetos___________________-outline4" style:family="presentation" style:parent-style-name="Título_20_y_20_objetos_5f__5f__5f__5f__5f__5f__5f__5f_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_5f__5f__5f_-outline5" style:display-name="Título y objetos___________________-outline5" style:family="presentation" style:parent-style-name="Título_20_y_20_objetos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_5f_-outline6" style:display-name="Título y objetos___________________-outline6" style:family="presentation" style:parent-style-name="Título_20_y_20_objetos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_5f_-outline7" style:display-name="Título y objetos___________________-outline7" style:family="presentation" style:parent-style-name="Título_20_y_20_objetos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_5f_-outline8" style:display-name="Título y objetos___________________-outline8" style:family="presentation" style:parent-style-name="Título_20_y_20_objetos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_5f_-outline9" style:display-name="Título y objetos___________________-outline9" style:family="presentation" style:parent-style-name="Título_20_y_20_objetos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_5f_-subtitle" style:display-name="Título y objetos___________________-subtitle" style:family="presentation">
      <style:graphic-properties draw:stroke="none" draw:fill="none" draw:textarea-vertical-align="middle">
        <text:list-style style:name="Título_20_y_20_objetos_5f__5f__5f__5f__5f__5f__5f__5f__5f__5f__5f__5f__5f__5f__5f__5f__5f__5f__5f_-subtitle" style:display-name="Título y objetos________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_5f__5f__5f__5f_-title" style:display-name="Título y objetos________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_5f__5f__5f__5f__5f__5f__5f__5f_-title" style:display-name="Título y objetos________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_5f__5f__5f__5f__5f_-background" style:display-name="Título y objetos_________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_5f__5f__5f__5f__5f__5f__5f__5f__5f_-backgroundobjects" style:display-name="Título y objetos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_5f__5f__5f__5f__5f__5f__5f__5f__5f_-notes" style:display-name="Título y objetos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_5f__5f__5f__5f__5f_-outline1" style:display-name="Título y objetos_________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_5f__5f__5f__5f__5f__5f__5f__5f__5f_-outline1" style:display-name="Título y objetos_________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_5f__5f__5f__5f__5f_-outline2" style:display-name="Título y objetos____________________-outline2" style:family="presentation" style:parent-style-name="Título_20_y_20_objetos_5f__5f__5f__5f__5f__5f__5f__5f__5f_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_5f__5f__5f__5f_-outline3" style:display-name="Título y objetos____________________-outline3" style:family="presentation" style:parent-style-name="Título_20_y_20_objetos_5f__5f__5f__5f__5f__5f__5f__5f__5f_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_5f__5f__5f__5f_-outline4" style:display-name="Título y objetos____________________-outline4" style:family="presentation" style:parent-style-name="Título_20_y_20_objetos_5f__5f__5f__5f__5f__5f__5f__5f__5f_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_5f__5f__5f__5f__5f_-outline5" style:display-name="Título y objetos____________________-outline5" style:family="presentation" style:parent-style-name="Título_20_y_20_objetos_5f_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_5f__5f_-outline6" style:display-name="Título y objetos____________________-outline6" style:family="presentation" style:parent-style-name="Título_20_y_20_objetos_5f_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_5f__5f_-outline7" style:display-name="Título y objetos____________________-outline7" style:family="presentation" style:parent-style-name="Título_20_y_20_objetos_5f_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_5f__5f_-outline8" style:display-name="Título y objetos____________________-outline8" style:family="presentation" style:parent-style-name="Título_20_y_20_objetos_5f_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_5f__5f_-outline9" style:display-name="Título y objetos____________________-outline9" style:family="presentation" style:parent-style-name="Título_20_y_20_objetos_5f_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_5f__5f__5f__5f__5f_-subtitle" style:display-name="Título y objetos____________________-subtitle" style:family="presentation">
      <style:graphic-properties draw:stroke="none" draw:fill="none" draw:textarea-vertical-align="middle">
        <text:list-style style:name="Título_20_y_20_objetos_5f__5f__5f__5f__5f__5f__5f__5f__5f__5f__5f__5f__5f__5f__5f__5f__5f__5f__5f__5f_-subtitle" style:display-name="Título y objetos_________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_5f__5f__5f__5f__5f_-title" style:display-name="Título y objetos_________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_5f__5f__5f__5f__5f__5f__5f__5f__5f_-title" style:display-name="Título y objetos_________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5365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6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3.181cm" fo:padding-top="0.254cm" fo:padding-bottom="0.254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ítulo_20_y_20_texto_20_vertical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ítulo_20_y_20_texto_20_vertical-outline1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6" style:family="presentation" style:parent-style-name="Título_20_y_20_texto_20_vertic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Título_20_y_20_texto_20_vertic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Título_20_vertical_20_y_20_texto-title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3.181cm" fo:min-width="22.86cm" fo:padding-top="1.016cm" fo:padding-bottom="1.016cm" fo:padding-left="0.635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9" style:family="presentation" style:parent-style-name="Título_20_vertical_20_y_20_texto-outline1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0" style:family="presentation" style:parent-style-name="Título_20_vertical_20_y_20_text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ítulo_20_vertical_20_y_20_text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Título_2c__20_texto_20_y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Título_2c__20_texto_20_y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4" style:family="presentation" style:parent-style-name="Título_2c__20_texto_20_y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Título_2c__20_texto_20_y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ítulo_20_y_20_tabla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Título_20_y_20_tabl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ítulo_20_y_20_tabl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ítulo_20_y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Título_20_y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Título_20_y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Encabezado_20_de_20_sección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4" style:family="presentation" style:parent-style-name="Encabezado_20_de_20_sección-outline1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Encabezado_20_de_20_sec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os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Dos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9" style:family="presentation" style:parent-style-name="Dos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os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Comparación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Comparación-outline1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Comparación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Compara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a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Sólo_20_el_20_título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Sólo_20_el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Sólo_20_el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En_20_blanc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En_20_blanc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Contenido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2" style:family="presentation" style:parent-style-name="Contenido_20_con_20_título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3" style:family="presentation" style:parent-style-name="Contenido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Imagen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6" style:family="presentation" style:parent-style-name="Imagen_20_con_20_título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Imagen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Imagen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Título_20_y_20_objetos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Título_20_y_20_objetos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1" style:family="presentation" style:parent-style-name="Título_20_y_20_objetos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Título_20_y_20_objetos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Título_20_y_20_objetos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4" style:family="presentation" style:parent-style-name="Título_20_y_20_objetos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5" style:family="presentation" style:parent-style-name="Título_20_y_20_objetos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6" style:family="presentation" style:parent-style-name="Título_20_y_20_objetos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7" style:family="presentation" style:parent-style-name="Título_20_y_20_objetos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8" style:family="presentation" style:parent-style-name="Título_20_y_20_objetos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9" style:family="presentation" style:parent-style-name="Título_20_y_20_objetos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Título_20_y_20_objetos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Título_20_y_20_objetos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2" style:family="presentation" style:parent-style-name="Título_20_y_20_objetos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3" style:family="presentation" style:parent-style-name="Título_20_y_20_objetos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4" style:family="presentation" style:parent-style-name="Título_20_y_20_objetos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5" style:family="presentation" style:parent-style-name="Título_20_y_20_objetos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6" style:family="presentation" style:parent-style-name="Título_20_y_20_objetos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7" style:family="presentation" style:parent-style-name="Título_20_y_20_objetos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8" style:family="presentation" style:parent-style-name="Título_20_y_20_objetos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9" style:family="presentation" style:parent-style-name="Título_20_y_20_objetos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0" style:family="presentation" style:parent-style-name="Título_20_y_20_objetos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1" style:family="presentation" style:parent-style-name="Título_20_y_20_objetos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Título_20_y_20_objetos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3" style:family="presentation" style:parent-style-name="Título_20_y_20_objetos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4" style:family="presentation" style:parent-style-name="Título_20_y_20_objetos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5" style:family="presentation" style:parent-style-name="Título_20_y_20_objetos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6" style:family="presentation" style:parent-style-name="Título_20_y_20_objetos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7" style:family="presentation" style:parent-style-name="Título_20_y_20_objetos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8" style:family="presentation" style:parent-style-name="Título_20_y_20_objetos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9" style:family="presentation" style:parent-style-name="Título_20_y_20_objetos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0" style:family="presentation" style:parent-style-name="Título_20_y_20_objetos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1" style:family="presentation" style:parent-style-name="Título_20_y_20_objetos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2" style:family="presentation" style:parent-style-name="Título_20_y_20_objetos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3" style:family="presentation" style:parent-style-name="Título_20_y_20_objetos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4" style:family="presentation" style:parent-style-name="Título_20_y_20_objetos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5" style:family="presentation" style:parent-style-name="Título_20_y_20_objetos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6" style:family="presentation" style:parent-style-name="Título_20_y_20_objetos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7" style:family="presentation" style:parent-style-name="Título_20_y_20_objetos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8" style:family="presentation" style:parent-style-name="Título_20_y_20_objetos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9" style:family="presentation" style:parent-style-name="Título_20_y_20_objetos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0" style:family="presentation" style:parent-style-name="Título_20_y_20_objetos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1" style:family="presentation" style:parent-style-name="Título_20_y_20_objetos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2" style:family="presentation" style:parent-style-name="Título_20_y_20_objetos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3" style:family="presentation" style:parent-style-name="Título_20_y_20_objetos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4" style:family="presentation" style:parent-style-name="Título_20_y_20_objetos_5f_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5" style:family="presentation" style:parent-style-name="Título_20_y_20_objetos_5f_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6" style:family="presentation" style:parent-style-name="Título_20_y_20_objetos_5f_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7" style:family="presentation" style:parent-style-name="Título_20_y_20_objetos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8" style:family="presentation" style:parent-style-name="Título_20_y_20_objetos_5f__5f_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9" style:family="presentation" style:parent-style-name="Título_20_y_20_objetos_5f__5f_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0" style:family="presentation" style:parent-style-name="Título_20_y_20_objetos_5f__5f_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1" style:family="presentation" style:parent-style-name="Título_20_y_20_objetos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2" style:family="presentation" style:parent-style-name="Título_20_y_20_objetos_5f__5f__5f_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3" style:family="presentation" style:parent-style-name="Título_20_y_20_objetos_5f__5f__5f_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4" style:family="presentation" style:parent-style-name="Título_20_y_20_objetos_5f__5f__5f_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5" style:family="presentation" style:parent-style-name="Título_20_y_20_objetos_5f_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6" style:family="presentation" style:parent-style-name="Título_20_y_20_objetos_5f__5f__5f__5f_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7" style:family="presentation" style:parent-style-name="Título_20_y_20_objetos_5f__5f__5f__5f_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8" style:family="presentation" style:parent-style-name="Título_20_y_20_objetos_5f__5f__5f__5f_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9" style:family="presentation" style:parent-style-name="Título_20_y_20_objetos_5f__5f_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0" style:family="presentation" style:parent-style-name="Título_20_y_20_objetos_5f__5f__5f__5f__5f_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1" style:family="presentation" style:parent-style-name="Título_20_y_20_objetos_5f__5f__5f__5f__5f_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2" style:family="presentation" style:parent-style-name="Título_20_y_20_objetos_5f__5f__5f__5f__5f_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3" style:family="presentation" style:parent-style-name="Título_20_y_20_objetos_5f__5f__5f_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4" style:family="presentation" style:parent-style-name="Título_20_y_20_objetos_5f__5f__5f__5f__5f__5f_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5" style:family="presentation" style:parent-style-name="Título_20_y_20_objetos_5f__5f__5f__5f__5f__5f_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6" style:family="presentation" style:parent-style-name="Título_20_y_20_objetos_5f__5f__5f__5f__5f__5f_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7" style:family="presentation" style:parent-style-name="Título_20_y_20_objetos_5f__5f__5f__5f_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8" style:family="presentation" style:parent-style-name="Título_20_y_20_objetos_5f__5f__5f__5f__5f__5f__5f_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9" style:family="presentation" style:parent-style-name="Título_20_y_20_objetos_5f__5f__5f__5f__5f__5f__5f_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0" style:family="presentation" style:parent-style-name="Título_20_y_20_objetos_5f__5f__5f__5f__5f__5f__5f_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1" style:family="presentation" style:parent-style-name="Título_20_y_20_objetos_5f__5f__5f__5f__5f_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2" style:family="presentation" style:parent-style-name="Título_20_y_20_objetos_5f__5f__5f__5f__5f__5f__5f__5f_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3" style:family="presentation" style:parent-style-name="Título_20_y_20_objetos_5f__5f__5f__5f__5f__5f__5f__5f_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4" style:family="presentation" style:parent-style-name="Título_20_y_20_objetos_5f__5f__5f__5f__5f__5f__5f__5f_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5" style:family="presentation" style:parent-style-name="Título_20_y_20_objetos_5f__5f__5f__5f__5f__5f_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6" style:family="presentation" style:parent-style-name="Título_20_y_20_objetos_5f__5f__5f__5f__5f__5f__5f__5f__5f_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7" style:family="presentation" style:parent-style-name="Título_20_y_20_objetos_5f__5f__5f__5f__5f__5f__5f__5f__5f_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8" style:family="presentation" style:parent-style-name="Título_20_y_20_objetos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pt"/>
    </style:style>
    <style:style style:name="MP7" style:family="paragraph">
      <style:paragraph-properties fo:margin-left="1.12cm" fo:margin-right="0cm" fo:margin-top="0.42cm" fo:margin-bottom="0.35cm" fo:line-height="90%" fo:text-align="justify" fo:text-indent="-1.12cm" style:punctuation-wrap="simple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MP8" style:family="paragraph">
      <loext:graphic-properties draw:fill="none"/>
      <style:paragraph-properties fo:margin-left="1.12cm" fo:margin-right="0cm" fo:margin-top="0.169cm" fo:margin-bottom="0cm" fo:line-height="90%" fo:text-align="justify" fo:text-indent="-1.12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0pt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.296cm" fo:margin-bottom="0cm" fo:line-height="9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54cm" fo:margin-bottom="0cm" fo:line-height="9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191cm" fo:margin-bottom="0cm" fo:line-height="9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212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.254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.169cm" fo:margin-bottom="0cm" fo:line-height="9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.339cm" fo:margin-bottom="0cm" fo:line-height="90%" fo:text-align="start" fo:text-indent="0cm" style:punctuation-wrap="simple" style:writing-mode="lr-tb"/>
    </style:style>
    <style:style style:name="MP23" style:family="paragraph">
      <style:paragraph-properties fo:margin-left="0cm" fo:margin-right="0cm" fo:margin-top="0.148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5" style:family="paragraph">
      <style:paragraph-properties fo:margin-left="1.12cm" fo:margin-right="0cm" fo:margin-top="0.169cm" fo:margin-bottom="0cm" fo:line-height="90%" fo:text-align="justify" fo:text-indent="-1.12cm" style:punctuation-wrap="simple" loext:tab-stop-distance="0cm" style:writing-mode="lr-tb">
        <style:tab-stops>
          <style:tab-stop style:position="0cm"/>
        </style:tab-stops>
      </style:paragraph-properties>
      <style:text-properties fo:font-size="20pt"/>
    </style:style>
    <style:style style:name="MP26" style:family="paragraph">
      <loext:graphic-properties draw:fill="none"/>
      <style:paragraph-properties fo:margin-left="1.12cm" fo:margin-right="0cm" fo:margin-top="0.42cm" fo:margin-bottom="0.35cm" fo:line-height="90%" fo:text-align="justify" fo:text-indent="-1.12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MX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MX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es" fo:country="MX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MT6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text-transform="uppercase" fo:color="#ffb601" loext:opacity="100%" style:text-outline="false" style:text-line-through-style="none" style:text-line-through-type="none" style:text-position="0% 100%" style:font-name="Arial" fo:font-size="40pt" fo:letter-spacing="normal" fo:language="es" fo:country="E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2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2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MX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94cm" fo:height="0.494cm"/>
      </text:list-level-style-image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94cm" fo:height="0.494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445cm" fo:height="0.445cm"/>
      </text:list-level-style-image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94cm" fo:height="0.494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445cm" fo:height="0.445cm"/>
      </text:list-level-style-image>
      <text:list-level-style-image text:level="5" xlink:href="Pictures/100000010000005000000050C3391230.png" xlink:type="simple" xlink:show="embed" xlink:actuate="onLoad">
        <style:list-level-properties text:space-before="3.969cm" text:min-label-width="0.917cm" style:vertical-pos="middle" style:vertical-rel="line" fo:width="0.445cm" fo:height="0.445cm"/>
      </text:list-level-style-image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45cm" fo:height="0.445cm"/>
      </text:list-level-style-image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45cm" fo:height="0.445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395cm" fo:height="0.395cm"/>
      </text:list-level-style-image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45cm" fo:height="0.445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395cm" fo:height="0.395cm"/>
      </text:list-level-style-image>
      <text:list-level-style-image text:level="5" xlink:href="Pictures/100000010000005000000050C3391230.png" xlink:type="simple" xlink:show="embed" xlink:actuate="onLoad">
        <style:list-level-properties text:space-before="3.969cm" text:min-label-width="0.917cm" style:vertical-pos="middle" style:vertical-rel="line" fo:width="0.395cm" fo:height="0.395cm"/>
      </text:list-level-style-image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1" draw:text-style-name="MP10" draw:layer="backgroundobjects" svg:width="22.012cm" svg:height="3.689cm" svg:x="1.746cm" svg:y="6.731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texto_20_vertical" style:display-name="Título y texto vertical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6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 vertical" presentation:style-name="Mpr5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texto_20_vertical-title" draw:layer="backgroundobjects" svg:width="0.001cm" svg:height="0.001cm" svg:x="0cm" svg:y="2.123cm" presentation:class="page"/>
        <draw:frame presentation:style-name="Título_20_y_20_texto_20_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vertical_20_y_20_texto" style:display-name="Título vertical y text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8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 vertical" presentation:style-name="Mpr8" draw:text-style-name="MP10" draw:layer="backgroundobjects" svg:width="6.349cm" svg:height="7.932cm" svg:x="19.05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 vertical" presentation:style-name="Mpr9" draw:text-style-name="MP15" draw:layer="backgroundobjects" svg:width="18.626cm" svg:height="7.932cm" svg:x="0cm" svg:y="0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vertical_20_y_20_texto-title" draw:layer="backgroundobjects" svg:width="0.001cm" svg:height="0.001cm" svg:x="0cm" svg:y="2.123cm" presentation:class="page"/>
        <draw:frame presentation:style-name="Título_20_vertical_20_y_20_texto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c__20_texto_20_y_20_objetos" style:display-name="Título, texto y objetos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2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" presentation:style-name="Mpr13" draw:text-style-name="MP15" draw:layer="backgroundobjects" svg:width="11.482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13" draw:text-style-name="MP15" draw:layer="backgroundobjects" svg:width="11.482cm" svg:height="5.392cm" svg:x="12.912cm" svg:y="2.54cm" presentation:class="outline" presentation:user-transformed="true">
        <draw:text-box>
          <text:list text:style-name="ML5">
            <text:list-item>
              <text:p text:style-name="MP11"><text:span text:style-name="MT7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8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c__20_texto_20_y_20_objetos-title" draw:layer="backgroundobjects" svg:width="0.001cm" svg:height="0.001cm" svg:x="0cm" svg:y="2.123cm" presentation:class="page"/>
        <draw:frame presentation:style-name="Título_2c__20_text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tabla" style:display-name="Título y tabla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2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6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abla" presentation:style-name="Título_20_y_20_tabla-outline1" draw:layer="backgroundobjects" svg:width="23.388cm" svg:height="5.392cm" svg:x="1.005cm" svg:y="2.54cm" presentation:class="outline" presentation:placeholder="true" presentation:user-transformed="true">
        <draw:text-box/>
      </draw:frame>
      <presentation:notes style:page-layout-name="PM2">
        <draw:page-thumbnail presentation:style-name="Título_20_y_20_tabla-title" draw:layer="backgroundobjects" svg:width="0.001cm" svg:height="0.001cm" svg:x="0cm" svg:y="2.123cm" presentation:class="page"/>
        <draw:frame presentation:style-name="Título_20_y_20_tabla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4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2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0.001cm" svg:height="0.001cm" svg:x="0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6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23" draw:text-style-name="MP16" draw:layer="backgroundobjects" svg:width="21.589cm" svg:height="3.783cm" svg:x="2.006cm" svg:y="12.241cm" presentation:class="title" presentation:user-transformed="true">
        <draw:text-box>
          <text:p text:style-name="MP9"><text:span text:style-name="MT11">Haga clic para modificar el estilo de título del patrón</text:span></text:p>
        </draw:text-box>
      </draw:frame>
      <draw:frame draw:name="2 Marcador de texto" presentation:style-name="Mpr24" draw:text-style-name="MP18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17"><text:span text:style-name="MT9">Haga clic para modificar el estilo de texto del patrón</text:span></text:p>
            </text:list-item>
          </text:list>
        </draw:text-box>
      </draw:frame>
      <presentation:notes style:page-layout-name="PM2">
        <draw:page-thumbnail presentation:style-name="Encabezado_20_de_20_sección-title" draw:layer="backgroundobjects" svg:width="0.001cm" svg:height="0.001cm" svg:x="0cm" svg:y="2.123cm" presentation:class="page"/>
        <draw:frame presentation:style-name="Encabezado_20_de_20_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os_20_objetos" style:display-name="Dos objetos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8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2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28" draw:text-style-name="MP15" draw:layer="backgroundobjects" svg:width="11.482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28" draw:text-style-name="MP15" draw:layer="backgroundobjects" svg:width="11.482cm" svg:height="5.392cm" svg:x="12.912cm" svg:y="2.54cm" presentation:class="outline" presentation:user-transformed="true">
        <draw:text-box>
          <text:list text:style-name="ML5">
            <text:list-item>
              <text:p text:style-name="MP11"><text:span text:style-name="MT7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8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os_20_objetos-title" draw:layer="backgroundobjects" svg:width="0.001cm" svg:height="0.001cm" svg:x="0cm" svg:y="2.123cm" presentation:class="page"/>
        <draw:frame presentation:style-name="Dos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ción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0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31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" presentation:style-name="Mpr32" draw:text-style-name="MP20" draw:layer="backgroundobjects" svg:width="11.222cm" svg:height="1.776cm" svg:x="1.27cm" svg:y="4.264cm" presentation:class="outline" presentation:user-transformed="true">
        <draw:text-box>
          <text:list text:style-name="ML4">
            <text:list-item>
              <text:p text:style-name="MP19"><text:span text:style-name="MT12">Haga clic para modificar el estilo de texto del patrón</text:span></text:p>
            </text:list-item>
          </text:list>
        </draw:text-box>
      </draw:frame>
      <draw:frame draw:name="3 Marcador de contenido" presentation:style-name="Mpr33" draw:text-style-name="MP20" draw:layer="backgroundobjects" svg:width="11.222cm" svg:height="10.975cm" svg:x="1.27cm" svg:y="6.041cm" presentation:class="outline" presentation:user-transformed="true">
        <draw:text-box>
          <text:list text:style-name="ML10">
            <text:list-item>
              <text:p text:style-name="MP12"><text:span text:style-name="MT8">Haga clic para modificar el estilo de texto del patrón</text:span></text:p>
            </text:list-item>
          </text:list>
          <text:list text:style-name="ML11">
            <text:list-item>
              <text:list>
                <text:list-item>
                  <text:p text:style-name="MP13"><text:span text:style-name="MT9">Segundo ni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0">Tercer ni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4 Marcador de texto" presentation:style-name="Mpr32" draw:text-style-name="MP20" draw:layer="backgroundobjects" svg:width="11.226cm" svg:height="1.776cm" svg:x="12.903cm" svg:y="4.264cm" presentation:class="outline" presentation:user-transformed="true">
        <draw:text-box>
          <text:p text:style-name="MP19"><text:span text:style-name="MT12">Haga clic para modificar el estilo de texto del patrón</text:span></text:p>
        </draw:text-box>
      </draw:frame>
      <draw:frame draw:name="5 Marcador de contenido" presentation:style-name="Mpr33" draw:text-style-name="MP20" draw:layer="backgroundobjects" svg:width="11.226cm" svg:height="10.975cm" svg:x="12.903cm" svg:y="6.041cm" presentation:class="outline" presentation:user-transformed="true">
        <draw:text-box>
          <text:list text:style-name="ML10">
            <text:list-item>
              <text:p text:style-name="MP12"><text:span text:style-name="MT8">Haga clic para modificar el estilo de texto del patrón</text:span></text:p>
            </text:list-item>
          </text:list>
          <text:list text:style-name="ML11">
            <text:list-item>
              <text:list>
                <text:list-item>
                  <text:p text:style-name="MP13"><text:span text:style-name="MT9">Segundo ni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0">Tercer ni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aración-title" draw:layer="backgroundobjects" svg:width="0.001cm" svg:height="0.001cm" svg:x="0cm" svg:y="2.123cm" presentation:class="page"/>
        <draw:frame presentation:style-name="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2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36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presentation:notes style:page-layout-name="PM2">
        <draw:page-thumbnail presentation:style-name="Sólo_20_el_20_título-title" draw:layer="backgroundobjects" svg:width="0.001cm" svg:height="0.001cm" svg:x="0cm" svg:y="2.123cm" presentation:class="page"/>
        <draw:frame presentation:style-name="Sólo_20_el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4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En_20_blanco-title" draw:layer="backgroundobjects" svg:width="0.001cm" svg:height="0.001cm" svg:x="0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6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1" draw:text-style-name="MP18" draw:layer="backgroundobjects" svg:width="8.355cm" svg:height="3.227cm" svg:x="1.27cm" svg:y="0.758cm" presentation:class="title" presentation:user-transformed="true">
        <draw:text-box>
          <text:p text:style-name="MP9"><text:span text:style-name="MT14">Haga clic para modificar el estilo de título del patrón</text:span></text:p>
        </draw:text-box>
      </draw:frame>
      <draw:frame draw:name="2 Marcador de contenido" presentation:style-name="Mpr42" draw:text-style-name="MP10" draw:layer="backgroundobjects" svg:width="14.198cm" svg:height="16.258cm" svg:x="9.931cm" svg:y="0.758cm" presentation:class="outline" presentation:user-transformed="true">
        <draw:text-box>
          <text:list text:style-name="ML4">
            <text:list-item>
              <text:p text:style-name="MP22"><text:span text:style-name="MT15">Haga clic para modificar el estilo de texto del patrón</text:span></text:p>
              <text:list>
                <text:list-item>
                  <text:p text:style-name="MP11"><text:span text:style-name="MT7">Segundo nivel</text:span></text:p>
                  <text:list>
                    <text:list-item>
                      <text:p text:style-name="MP12"><text:span text:style-name="MT8">Tercer nivel</text:span></text:p>
                      <text:list>
                        <text:list-item>
                          <text:p text:style-name="MP13"><text:span text:style-name="MT9">Cuarto nivel</text:span></text:p>
                          <text:list>
                            <text:list-item>
                              <text:p text:style-name="MP13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texto" presentation:style-name="Mpr42" draw:text-style-name="MP24" draw:layer="backgroundobjects" svg:width="8.355cm" svg:height="13.03cm" svg:x="1.27cm" svg:y="3.986cm" presentation:class="outline" presentation:user-transformed="true">
        <draw:text-box>
          <text:p text:style-name="MP23"><text:span text:style-name="MT16">Haga clic para modificar el estilo de texto del patrón</text:span></text:p>
        </draw:text-box>
      </draw:frame>
      <presentation:notes style:page-layout-name="PM2">
        <draw:page-thumbnail presentation:style-name="Contenido_20_con_20_título-title" draw:layer="backgroundobjects" svg:width="0.001cm" svg:height="0.001cm" svg:x="0cm" svg:y="2.123cm" presentation:class="page"/>
        <draw:frame presentation:style-name="Contenido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n_20_con_20_título" style:display-name="Imagen con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8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5" draw:text-style-name="MP18" draw:layer="backgroundobjects" svg:width="15.239cm" svg:height="1.573cm" svg:x="4.979cm" svg:y="13.335cm" presentation:class="title" presentation:user-transformed="true">
        <draw:text-box>
          <text:p text:style-name="MP9"><text:span text:style-name="MT14">Haga clic para modificar el estilo de título del patrón</text:span></text:p>
        </draw:text-box>
      </draw:frame>
      <draw:frame draw:name="2 Marcador de posición de imagen" presentation:style-name="Imagen_20_con_20_título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3 Marcador de texto" presentation:style-name="Mpr46" draw:text-style-name="MP24" draw:layer="backgroundobjects" svg:width="15.239cm" svg:height="2.235cm" svg:x="4.979cm" svg:y="14.909cm" presentation:class="outline" presentation:user-transformed="true">
        <draw:text-box>
          <text:p text:style-name="MP23"><text:span text:style-name="MT16">Haga clic para modificar el estilo de texto del patrón</text:span></text:p>
        </draw:text-box>
      </draw:frame>
      <presentation:notes style:page-layout-name="PM2">
        <draw:page-thumbnail presentation:style-name="Imagen_20_con_20_título-title" draw:layer="backgroundobjects" svg:width="0.001cm" svg:height="0.001cm" svg:x="0cm" svg:y="2.123cm" presentation:class="page"/>
        <draw:frame presentation:style-name="Imagen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" style:display-name="Título y objetos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0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5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-title" draw:layer="backgroundobjects" svg:width="0.001cm" svg:height="0.001cm" svg:x="0cm" svg:y="2.123cm" presentation:class="page"/>
        <draw:frame presentation:style-name="Título_20_y_20_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" style:display-name="Título y objetos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2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53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54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-title" draw:layer="backgroundobjects" svg:width="0.001cm" svg:height="0.001cm" svg:x="0cm" svg:y="2.123cm" presentation:class="page"/>
        <draw:frame presentation:style-name="Título_20_y_20_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" style:display-name="Título y objetos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4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5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58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-title" draw:layer="backgroundobjects" svg:width="0.001cm" svg:height="0.001cm" svg:x="0cm" svg:y="2.123cm" presentation:class="page"/>
        <draw:frame presentation:style-name="Título_20_y_20_objetos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" style:display-name="Título y objetos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6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1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62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-title" draw:layer="backgroundobjects" svg:width="0.001cm" svg:height="0.001cm" svg:x="0cm" svg:y="2.123cm" presentation:class="page"/>
        <draw:frame presentation:style-name="Título_20_y_20_objetos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" style:display-name="Título y objetos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8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5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66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-title" draw:layer="backgroundobjects" svg:width="0.001cm" svg:height="0.001cm" svg:x="0cm" svg:y="2.123cm" presentation:class="page"/>
        <draw:frame presentation:style-name="Título_20_y_20_objetos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" style:display-name="Título y objetos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0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7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-title" draw:layer="backgroundobjects" svg:width="0.001cm" svg:height="0.001cm" svg:x="0cm" svg:y="2.123cm" presentation:class="page"/>
        <draw:frame presentation:style-name="Título_20_y_20_objetos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" style:display-name="Título y objetos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4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2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73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74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-title" draw:layer="backgroundobjects" svg:width="0.001cm" svg:height="0.001cm" svg:x="0cm" svg:y="2.123cm" presentation:class="page"/>
        <draw:frame presentation:style-name="Título_20_y_20_objetos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" style:display-name="Título y objetos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4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4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7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78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-title" draw:layer="backgroundobjects" svg:width="0.001cm" svg:height="0.001cm" svg:x="0cm" svg:y="2.123cm" presentation:class="page"/>
        <draw:frame presentation:style-name="Título_20_y_20_objetos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_5f_" style:display-name="Título y objetos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4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6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81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82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-title" draw:layer="backgroundobjects" svg:width="0.001cm" svg:height="0.001cm" svg:x="0cm" svg:y="2.123cm" presentation:class="page"/>
        <draw:frame presentation:style-name="Título_20_y_20_objetos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_5f__5f_" style:display-name="Título y objetos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4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8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85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86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_5f__5f__5f_" style:display-name="Título y objetos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4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0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8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9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_5f__5f__5f__5f_" style:display-name="Título y objetos_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5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2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93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94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_5f__5f__5f__5f__5f_" style:display-name="Título y objetos__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5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4" draw:text-style-name="MP8" draw:layer="backgroundobjects" svg:width="10.98cm" svg:height="0.86cm" svg:x="0.011cm" svg:y="18.162cm">
        <text:p text:style-name="MP25"><text:span text:style-name="MT17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9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98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_5f__5f__5f__5f__5f__5f_" style:display-name="Título y objetos___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5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6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01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102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_5f__5f__5f__5f__5f__5f__5f_" style:display-name="Título y objetos____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5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8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05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106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_5f__5f__5f__5f__5f__5f__5f__5f_" style:display-name="Título y objetos_____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5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60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0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11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_5f__5f__5f__5f__5f__5f__5f__5f__5f_" style:display-name="Título y objetos______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6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62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13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114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_5f__5f__5f__5f__5f__5f__5f__5f__5f__5f_" style:display-name="Título y objetos_______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6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64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1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118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_5f__5f__5f__5f__5f__5f__5f__5f__5f__5f__5f_" style:display-name="Título y objetos________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6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66" draw:text-style-name="MP8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21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122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_5f__5f__5f__5f__5f__5f__5f__5f__5f__5f__5f__5f_" style:display-name="Título y objetos_________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6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68" draw:text-style-name="MP26" draw:layer="backgroundobjects" svg:width="10.98cm" svg:height="1.011cm" svg:x="0.011cm" svg:y="18.162cm">
        <text:p text:style-name="MP7"><text:span text:style-name="MT4"><text:a xlink:href="https://github.com/XRUS1" xlink:type="simple">XRUS1</text:a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25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126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Windows Driver Foundation: Introduction</dc:title>
    <meta:editing-cycles>114</meta:editing-cycles>
    <meta:creation-date>1901-01-01T07:00:00</meta:creation-date>
    <dc:date>2026-06-30T15:42:46.588000000</dc:date>
    <meta:editing-duration>PT20H57M33S</meta:editing-duration>
    <meta:generator>LibreOffice/24.2.1.2$Windows_X86_64 LibreOffice_project/db4def46b0453cc22e2d0305797cf981b68ef5ac</meta:generator>
    <meta:print-date>2025-07-17T17:17:26.498000000</meta:print-date>
    <meta:printed-by>Archivos PDF</meta:printed-by>
    <meta:document-statistic meta:object-count="369"/>
    <meta:user-defined meta:name="AppVersion">16.0000</meta:user-defined>
    <meta:user-defined meta:name="Notes" meta:value-type="float">1</meta:user-defined>
    <meta:user-defined meta:name="PresentationFormat">Presentación en pantalla (4:3)</meta:user-defined>
    <meta:user-defined meta:name="Slides" meta:value-type="float">11</meta:user-defined>
  </office:meta>
</office:document-meta>
</file>